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2" style:family="table-cell" style:parent-style-name="Default" style:data-style-name="N0">
      <style:table-cell-properties fo:border-top="thin solid #000000" fo:border-bottom="thin solid #000000" fo:border-left="none" fo:border-right="thick solid #FFFFFF" style:vertical-align="automatic" fo:background-color="#B4C6E7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" style:family="table-cell" style:parent-style-name="Default" style:data-style-name="N0">
      <style:table-cell-properties fo:border-top="thin solid #000000" fo:border-bottom="thin solid #000000" fo:border-left="thick solid #FFFFFF" fo:border-right="thick solid #FFFFFF" style:vertical-align="automatic" fo:background-color="#B4C6E7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fo:border-top="thin solid #000000" fo:border-bottom="thin solid #000000" fo:border-left="thick solid #FFFFFF" fo:border-right="none" style:vertical-align="automatic" fo:background-color="#B4C6E7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style:vertical-align="automatic" fo:background-color="#8EA9DB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ext-properties fo:color="#000000" style:font-name="Arial" style:font-name-asian="Arial" style:font-name-complex="Arial" fo:font-size="7pt" style:font-size-asian="7pt" style:font-size-complex="7pt"/>
    </style:style>
    <style:style style:name="ce15" style:family="table-cell" style:parent-style-name="Porcentagem" style:data-style-name="N14">
      <style:table-cell-properties style:vertical-align="automatic" fo:background-color="transparent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7"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2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3" style:family="table-cell" style:parent-style-name="Default" style:data-style-name="N3">
      <style:table-cell-properties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Porcentagem" style:data-style-name="N3">
      <style:table-cell-properties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style:vertical-align="automatic" fo:wrap-option="wrap" fo:background-color="#D9E1F2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Porcentagem" style:data-style-name="N38">
      <style:table-cell-properties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38">
      <style:table-cell-properties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V_237_rgula" style:data-style-name="N39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V_237_rgula" style:data-style-name="N39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4.578541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9.57791666666667cm"/>
    </style:style>
    <style:style style:name="co6" style:family="table-column">
      <style:table-column-properties fo:break-before="auto" style:column-width="1.825625cm" style:use-optimal-column-width="true"/>
    </style:style>
    <style:style style:name="co7" style:family="table-column">
      <style:table-column-properties fo:break-before="auto" style:column-width="16.271875cm" style:use-optimal-column-width="true"/>
    </style:style>
    <style:style style:name="co8" style:family="table-column">
      <style:table-column-properties fo:break-before="auto" style:column-width="2.619375cm" style:use-optimal-column-width="true"/>
    </style:style>
    <style:style style:name="co9" style:family="table-column">
      <style:table-column-properties fo:break-before="auto" style:column-width="1.82562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9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6.9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_est_fís_Brasil" table:style-name="ta1">
        <table:table-column table:style-name="co1" table:default-cell-style-name="ce14"/>
        <table:table-column table:style-name="co2" table:default-cell-style-name="ce13"/>
        <table:table-column table:style-name="co3" table:number-columns-repeated="3" table:default-cell-style-name="ce20"/>
        <table:table-column table:style-name="co4" table:number-columns-repeated="249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3" table:default-cell-style-name="ce1"/>
        <table:table-row table:style-name="ro1">
          <table:table-cell office:value-type="string" table:number-columns-spanned="5" table:number-rows-spanned="1" table:style-name="ce32">
            <text:p>Indicadores de Estoques e Físicos: Brasil, 2018-2020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1">
          <table:table-cell office:value-type="string" table:style-name="ce2">
            <text:p>Indicadores</text:p>
          </table:table-cell>
          <table:table-cell office:value-type="string" table:style-name="ce3">
            <text:p>Unidade</text:p>
          </table:table-cell>
          <table:table-cell office:value-type="float" office:value="2018" table:style-name="ce4">
            <text:p>2018</text:p>
          </table:table-cell>
          <table:table-cell office:value-type="float" office:value="2019" table:style-name="ce4">
            <text:p>2019</text:p>
          </table:table-cell>
          <table:table-cell office:value-type="float" office:value="2020" table:style-name="ce4">
            <text:p>2020</text:p>
          </table:table-cell>
          <table:table-cell table:number-columns-repeated="16379"/>
        </table:table-row>
        <table:table-row table:style-name="ro1">
          <table:table-cell table:number-columns-repeated="5" table:style-name="ce5"/>
          <table:table-cell table:number-columns-repeated="16379"/>
        </table:table-row>
        <table:table-row table:style-name="ro1">
          <table:table-cell office:value-type="string" table:style-name="ce6">
            <text:p>INDICADORES DE ESTOQUE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office:value-type="string" table:style-name="ce8">
            <text:p>Total de Recursos Hídricos Renováveis (TRHR)</text:p>
          </table:table-cell>
          <table:table-cell office:value-type="string" table:style-name="ce9">
            <text:p>hm<text:span text:style-name="T1">3</text:span></text:p>
          </table:table-cell>
          <table:table-cell office:value-type="float" office:value="8306766" table:style-name="ce24">
            <text:p>8.306.766</text:p>
          </table:table-cell>
          <table:table-cell office:value-type="float" office:value="8380734" table:style-name="ce24">
            <text:p>8.380.734</text:p>
          </table:table-cell>
          <table:table-cell office:value-type="float" office:value="6733794" table:style-name="ce24">
            <text:p>6.733.794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Total de Recursos Hídricos Renováveis (TRHR)<text:s/><text:span text:style-name="T2">per capita</text:span></text:p>
          </table:table-cell>
          <table:table-cell office:value-type="string" table:style-name="ce9">
            <text:p>m<text:span text:style-name="T3">3</text:span><text:span text:style-name="T4">/habitante/ano</text:span></text:p>
          </table:table-cell>
          <table:table-cell office:value-type="float" office:value="39841.578858763452" table:style-name="ce24">
            <text:p>39.842</text:p>
          </table:table-cell>
          <table:table-cell office:value-type="float" office:value="39880.317182545325" table:style-name="ce24">
            <text:p>39.880</text:p>
          </table:table-cell>
          <table:table-cell office:value-type="float" office:value="31799.825243894742" table:style-name="ce24">
            <text:p>31.8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Índice de Retirada (IR) - Volume captado como proporção do TRHR</text:p>
          </table:table-cell>
          <table:table-cell office:value-type="string" table:style-name="ce9">
            <text:p>%</text:p>
          </table:table-cell>
          <table:table-cell office:value-type="float" office:value="6.7891631007797599" table:style-name="ce26">
            <text:p>6,8</text:p>
          </table:table-cell>
          <table:table-cell office:value-type="float" office:value="6.7244127678487713" table:style-name="ce26">
            <text:p>6,7</text:p>
          </table:table-cell>
          <table:table-cell office:value-type="float" office:value="8.5436591248021276" table:style-name="ce26">
            <text:p>8,5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Razão de dependência (RD) - Volume de entradas de outros países a montante como proporção de TRHR</text:p>
          </table:table-cell>
          <table:table-cell office:value-type="string" table:style-name="ce9">
            <text:p>%</text:p>
          </table:table-cell>
          <table:table-cell office:value-type="float" office:value="34.32770346486226" table:style-name="ce26">
            <text:p>34,3</text:p>
          </table:table-cell>
          <table:table-cell office:value-type="float" office:value="35.18607081432247" table:style-name="ce26">
            <text:p>35,2</text:p>
          </table:table-cell>
          <table:table-cell office:value-type="float" office:value="36.08693702242747" table:style-name="ce26">
            <text:p>36,1</text:p>
          </table:table-cell>
          <table:table-cell table:number-columns-repeated="16379"/>
        </table:table-row>
        <table:table-row table:style-name="ro1">
          <table:table-cell table:number-columns-repeated="5" table:style-name="ce5"/>
          <table:table-cell table:number-columns-repeated="16379"/>
        </table:table-row>
        <table:table-row table:style-name="ro1">
          <table:table-cell office:value-type="string" table:style-name="ce6">
            <text:p>INDICADORES FÍSICOS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office:value-type="string" table:style-name="ce10">
            <text:p>Retirada total de água</text:p>
          </table:table-cell>
          <table:table-cell table:style-name="ce7"/>
          <table:table-cell table:number-columns-repeated="3" table:style-name="ce11"/>
          <table:table-cell table:number-columns-repeated="16379"/>
        </table:table-row>
        <table:table-row table:style-name="ro1">
          <table:table-cell office:value-type="string" table:style-name="ce10">
            <text:p>Participação das atividades econômicas na retirada total</text:p>
          </table:table-cell>
          <table:table-cell office:value-type="string" table:style-name="ce7">
            <text:p>%</text:p>
          </table:table-cell>
          <table:table-cell office:value-type="float" office:value="99.982518115242215" table:style-name="ce30">
            <text:p><text:s/>100,0<text:s/></text:p>
          </table:table-cell>
          <table:table-cell office:value-type="float" office:value="99.983184107540566" table:style-name="ce30">
            <text:p><text:s/>100,0<text:s/></text:p>
          </table:table-cell>
          <table:table-cell office:value-type="float" office:value="99.983286396948785" table:style-name="ce30">
            <text:p><text:s/>100,0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Agricultura, pecuária, produção florestal, pesca e aquicultura</text:p>
          </table:table-cell>
          <table:table-cell office:value-type="string" table:style-name="ce13">
            <text:p>%</text:p>
          </table:table-cell>
          <table:table-cell office:value-type="float" office:value="13.310568155168658" table:style-name="ce31">
            <text:p><text:s/>13,3<text:s/></text:p>
          </table:table-cell>
          <table:table-cell office:value-type="float" office:value="12.885471127642814" table:style-name="ce31">
            <text:p><text:s/>12,9<text:s/></text:p>
          </table:table-cell>
          <table:table-cell office:value-type="float" office:value="13.181538024778227" table:style-name="ce31">
            <text:p><text:s/>13,2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Indústrias extrativas</text:p>
          </table:table-cell>
          <table:table-cell office:value-type="string" table:style-name="ce13">
            <text:p>%</text:p>
          </table:table-cell>
          <table:table-cell office:value-type="float" office:value="2.1049648644254227E-2" table:style-name="ce31">
            <text:p><text:s/>0,0<text:s/></text:p>
          </table:table-cell>
          <table:table-cell office:value-type="float" office:value="2.1334468029457449E-2" table:style-name="ce31">
            <text:p><text:s/>0,0<text:s/></text:p>
          </table:table-cell>
          <table:table-cell office:value-type="float" office:value="2.2313728741841787E-2" table:style-name="ce31">
            <text:p><text:s/>0,0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Indústrias de transformação e construção</text:p>
          </table:table-cell>
          <table:table-cell office:value-type="string" table:style-name="ce13">
            <text:p>%</text:p>
          </table:table-cell>
          <table:table-cell office:value-type="float" office:value="0.14461974022736612" table:style-name="ce31">
            <text:p><text:s/>0,1<text:s/></text:p>
          </table:table-cell>
          <table:table-cell office:value-type="float" office:value="0.14090868405945112" table:style-name="ce31">
            <text:p><text:s/>0,1<text:s/></text:p>
          </table:table-cell>
          <table:table-cell office:value-type="float" office:value="0.14492110152982723" table:style-name="ce31">
            <text:p><text:s/>0,1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Eletricidade e gás</text:p>
          </table:table-cell>
          <table:table-cell office:value-type="string" table:style-name="ce13">
            <text:p>%</text:p>
          </table:table-cell>
          <table:table-cell office:value-type="float" office:value="85.058001776074107" table:style-name="ce31">
            <text:p><text:s/>85,1<text:s/></text:p>
          </table:table-cell>
          <table:table-cell office:value-type="float" office:value="85.528523228666771" table:style-name="ce31">
            <text:p><text:s/>85,5<text:s/></text:p>
          </table:table-cell>
          <table:table-cell office:value-type="float" office:value="85.247188356456391" table:style-name="ce31">
            <text:p><text:s/>85,2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Água e esgoto</text:p>
          </table:table-cell>
          <table:table-cell office:value-type="string" table:style-name="ce13">
            <text:p>%</text:p>
          </table:table-cell>
          <table:table-cell office:value-type="float" office:value="1.4482787951278195" table:style-name="ce31">
            <text:p><text:s/>1,4<text:s/></text:p>
          </table:table-cell>
          <table:table-cell office:value-type="float" office:value="1.4069465991420829" table:style-name="ce31">
            <text:p><text:s/>1,4<text:s/></text:p>
          </table:table-cell>
          <table:table-cell office:value-type="float" office:value="1.3873251854425015" table:style-name="ce31">
            <text:p><text:s/>1,4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Demais atividades</text:p>
          </table:table-cell>
          <table:table-cell office:value-type="string" table:style-name="ce13">
            <text:p>%</text:p>
          </table:table-cell>
          <table:table-cell office:value-type="float" office:value="0" table:style-name="ce31">
            <text:p><text:s/>-<text:s text:c="3"/></text:p>
          </table:table-cell>
          <table:table-cell office:value-type="float" office:value="0" table:style-name="ce31">
            <text:p><text:s/>-<text:s text:c="3"/></text:p>
          </table:table-cell>
          <table:table-cell office:value-type="float" office:value="0" table:style-name="ce31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articipação das Famílias na retirada total</text:p>
          </table:table-cell>
          <table:table-cell office:value-type="string" table:style-name="ce7">
            <text:p>%</text:p>
          </table:table-cell>
          <table:table-cell office:value-type="float" office:value="1.7481884757776015E-2" table:style-name="ce30">
            <text:p><text:s/>0,0<text:s/></text:p>
          </table:table-cell>
          <table:table-cell office:value-type="float" office:value="1.6815892459429032E-2" table:style-name="ce30">
            <text:p><text:s/>0,0<text:s/></text:p>
          </table:table-cell>
          <table:table-cell office:value-type="float" office:value="1.6713603051208125E-2" table:style-name="ce30">
            <text:p><text:s/>0,0<text:s/>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3"/>
          <table:table-cell table:number-columns-repeated="3" table:style-name="ce30"/>
          <table:table-cell table:number-columns-repeated="16379"/>
        </table:table-row>
        <table:table-row table:style-name="ro1">
          <table:table-cell office:value-type="string" table:style-name="ce10">
            <text:p>Uso total da água</text:p>
          </table:table-cell>
          <table:table-cell table:style-name="ce7"/>
          <table:table-cell table:number-columns-repeated="3" table:style-name="ce30"/>
          <table:table-cell table:number-columns-repeated="16379"/>
        </table:table-row>
        <table:table-row table:style-name="ro1">
          <table:table-cell office:value-type="string" table:style-name="ce10">
            <text:p>Participação das atividades econômicas no uso total da água</text:p>
          </table:table-cell>
          <table:table-cell office:value-type="string" table:style-name="ce7">
            <text:p>%</text:p>
          </table:table-cell>
          <table:table-cell office:value-type="float" office:value="99.781862363519494" table:style-name="ce30">
            <text:p><text:s/>99,8<text:s/></text:p>
          </table:table-cell>
          <table:table-cell office:value-type="float" office:value="99.784372023691333" table:style-name="ce30">
            <text:p><text:s/>99,8<text:s/></text:p>
          </table:table-cell>
          <table:table-cell office:value-type="float" office:value="99.781522023521987" table:style-name="ce30">
            <text:p><text:s/>99,8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Agricultura, pecuária, produção florestal, pesca e aquicultura</text:p>
          </table:table-cell>
          <table:table-cell office:value-type="string" table:style-name="ce13">
            <text:p>%</text:p>
          </table:table-cell>
          <table:table-cell office:value-type="float" office:value="13.288996266612212" table:style-name="ce31">
            <text:p><text:s/>13,3<text:s/></text:p>
          </table:table-cell>
          <table:table-cell office:value-type="float" office:value="12.868084010340276" table:style-name="ce31">
            <text:p><text:s/>12,9<text:s/></text:p>
          </table:table-cell>
          <table:table-cell office:value-type="float" office:value="13.15745557350389" table:style-name="ce31">
            <text:p><text:s/>13,2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Indústrias extrativas</text:p>
          </table:table-cell>
          <table:table-cell office:value-type="string" table:style-name="ce13">
            <text:p>%</text:p>
          </table:table-cell>
          <table:table-cell office:value-type="float" office:value="2.1164752618545241E-2" table:style-name="ce31">
            <text:p><text:s/>0,0<text:s/></text:p>
          </table:table-cell>
          <table:table-cell office:value-type="float" office:value="2.1445295315919422E-2" table:style-name="ce31">
            <text:p><text:s/>0,0<text:s/></text:p>
          </table:table-cell>
          <table:table-cell office:value-type="float" office:value="2.2426845391338518E-2" table:style-name="ce31">
            <text:p><text:s/>0,0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Indústrias de transformação e construção</text:p>
          </table:table-cell>
          <table:table-cell office:value-type="string" table:style-name="ce13">
            <text:p>%</text:p>
          </table:table-cell>
          <table:table-cell office:value-type="float" office:value="0.14981629925856305" table:style-name="ce31">
            <text:p><text:s/>0,1<text:s/></text:p>
          </table:table-cell>
          <table:table-cell office:value-type="float" office:value="0.14595843198585426" table:style-name="ce31">
            <text:p><text:s/>0,1<text:s/></text:p>
          </table:table-cell>
          <table:table-cell office:value-type="float" office:value="0.14963678049289872" table:style-name="ce31">
            <text:p><text:s/>0,1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Eletricidade e gás</text:p>
          </table:table-cell>
          <table:table-cell office:value-type="string" table:style-name="ce13">
            <text:p>%</text:p>
          </table:table-cell>
          <table:table-cell office:value-type="float" office:value="84.671417945291296" table:style-name="ce31">
            <text:p><text:s/>84,7<text:s/></text:p>
          </table:table-cell>
          <table:table-cell office:value-type="float" office:value="85.136986206656189" table:style-name="ce31">
            <text:p><text:s/>85,1<text:s/></text:p>
          </table:table-cell>
          <table:table-cell office:value-type="float" office:value="84.86373464093198" table:style-name="ce31">
            <text:p><text:s/>84,9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Água e esgoto</text:p>
          </table:table-cell>
          <table:table-cell office:value-type="string" table:style-name="ce13">
            <text:p>%</text:p>
          </table:table-cell>
          <table:table-cell office:value-type="float" office:value="1.6030552097060735" table:style-name="ce31">
            <text:p><text:s/>1,6<text:s/></text:p>
          </table:table-cell>
          <table:table-cell office:value-type="float" office:value="1.564611000873638" table:style-name="ce31">
            <text:p><text:s/>1,6<text:s/></text:p>
          </table:table-cell>
          <table:table-cell office:value-type="float" office:value="1.544730763063338" table:style-name="ce31">
            <text:p><text:s/>1,5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Demais atividades</text:p>
          </table:table-cell>
          <table:table-cell office:value-type="string" table:style-name="ce13">
            <text:p>%</text:p>
          </table:table-cell>
          <table:table-cell office:value-type="float" office:value="4.7411890032798394E-2" table:style-name="ce31">
            <text:p><text:s/>0,0<text:s/></text:p>
          </table:table-cell>
          <table:table-cell office:value-type="float" office:value="4.7287078519450798E-2" table:style-name="ce31">
            <text:p><text:s/>0,0<text:s/></text:p>
          </table:table-cell>
          <table:table-cell office:value-type="float" office:value="4.3537420138540867E-2" table:style-name="ce31">
            <text:p><text:s/>0,0<text:s/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articipação das Famílias no uso total da água</text:p>
          </table:table-cell>
          <table:table-cell office:value-type="string" table:style-name="ce7">
            <text:p>%</text:p>
          </table:table-cell>
          <table:table-cell office:value-type="float" office:value="0.21813763648049203" table:style-name="ce30">
            <text:p><text:s/>0,2<text:s/></text:p>
          </table:table-cell>
          <table:table-cell office:value-type="float" office:value="0.21562797630865949" table:style-name="ce30">
            <text:p><text:s/>0,2<text:s/></text:p>
          </table:table-cell>
          <table:table-cell office:value-type="float" office:value="0.21847797647802217" table:style-name="ce30">
            <text:p><text:s/>0,2<text:s/></text:p>
          </table:table-cell>
          <table:table-cell table:number-columns-repeated="16379"/>
        </table:table-row>
        <table:table-row table:style-name="ro1">
          <table:table-cell table:style-name="ce10"/>
          <table:table-cell table:style-name="ce7"/>
          <table:table-cell table:number-columns-repeated="3" table:style-name="ce30"/>
          <table:table-cell table:number-columns-repeated="16379"/>
        </table:table-row>
        <table:table-row table:style-name="ro1">
          <table:table-cell office:value-type="string" table:style-name="ce10">
            <text:p>Retorno total para o meio ambiente</text:p>
          </table:table-cell>
          <table:table-cell table:style-name="ce7"/>
          <table:table-cell table:number-columns-repeated="3" table:style-name="ce30"/>
          <table:table-cell table:number-columns-repeated="16379"/>
        </table:table-row>
        <table:table-row table:style-name="ro1">
          <table:table-cell office:value-type="string" table:style-name="ce10">
            <text:p>Participação das atividades econômicas no retorno total</text:p>
          </table:table-cell>
          <table:table-cell office:value-type="string" table:style-name="ce7">
            <text:p>%</text:p>
          </table:table-cell>
          <table:table-cell office:value-type="float" office:value="99.954850336412534" table:style-name="ce30">
            <text:p><text:s/>100,0<text:s/></text:p>
          </table:table-cell>
          <table:table-cell office:value-type="float" office:value="99.95815199205947" table:style-name="ce30">
            <text:p><text:s/>100,0<text:s/></text:p>
          </table:table-cell>
          <table:table-cell office:value-type="float" office:value="99.957213835258941" table:style-name="ce30">
            <text:p><text:s/>100,0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Agricultura, pecuária, produção florestal, pesca e aquicultura</text:p>
          </table:table-cell>
          <table:table-cell office:value-type="string" table:style-name="ce13">
            <text:p>%</text:p>
          </table:table-cell>
          <table:table-cell office:value-type="float" office:value="6.6927279687088985" table:style-name="ce31">
            <text:p><text:s/>6,7<text:s/></text:p>
          </table:table-cell>
          <table:table-cell office:value-type="float" office:value="6.3606639759570829" table:style-name="ce31">
            <text:p><text:s/>6,4<text:s/></text:p>
          </table:table-cell>
          <table:table-cell office:value-type="float" office:value="6.5215528140769736" table:style-name="ce31">
            <text:p><text:s/>6,5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Indústrias extrativas</text:p>
          </table:table-cell>
          <table:table-cell office:value-type="string" table:style-name="ce13">
            <text:p>%</text:p>
          </table:table-cell>
          <table:table-cell office:value-type="float" office:value="1.6012916768332459E-2" table:style-name="ce31">
            <text:p><text:s/>0,0<text:s/></text:p>
          </table:table-cell>
          <table:table-cell office:value-type="float" office:value="1.6199000360780369E-2" table:style-name="ce31">
            <text:p><text:s/>0,0<text:s/></text:p>
          </table:table-cell>
          <table:table-cell office:value-type="float" office:value="1.7009187332376018E-2" table:style-name="ce31">
            <text:p><text:s/>0,0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Indústrias de transformação e construção</text:p>
          </table:table-cell>
          <table:table-cell office:value-type="string" table:style-name="ce13">
            <text:p>%</text:p>
          </table:table-cell>
          <table:table-cell office:value-type="float" office:value="7.5010858616668327E-2" table:style-name="ce31">
            <text:p><text:s/>0,1<text:s/></text:p>
          </table:table-cell>
          <table:table-cell office:value-type="float" office:value="7.2427638599852684E-2" table:style-name="ce31">
            <text:p><text:s/>0,1<text:s/></text:p>
          </table:table-cell>
          <table:table-cell office:value-type="float" office:value="7.517457489224158E-2" table:style-name="ce31">
            <text:p><text:s/>0,1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Eletricidade e gás</text:p>
          </table:table-cell>
          <table:table-cell office:value-type="string" table:style-name="ce13">
            <text:p>%</text:p>
          </table:table-cell>
          <table:table-cell office:value-type="float" office:value="91.812407292303803" table:style-name="ce31">
            <text:p><text:s/>91,8<text:s/></text:p>
          </table:table-cell>
          <table:table-cell office:value-type="float" office:value="92.195593163268725" table:style-name="ce31">
            <text:p><text:s/>92,2<text:s/></text:p>
          </table:table-cell>
          <table:table-cell office:value-type="float" office:value="92.051592611703569" table:style-name="ce31">
            <text:p><text:s/>92,1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Água e esgoto</text:p>
          </table:table-cell>
          <table:table-cell office:value-type="string" table:style-name="ce13">
            <text:p>%</text:p>
          </table:table-cell>
          <table:table-cell office:value-type="float" office:value="1.3502006514456228" table:style-name="ce31">
            <text:p><text:s/>1,4<text:s/></text:p>
          </table:table-cell>
          <table:table-cell office:value-type="float" office:value="1.3054928026582786" table:style-name="ce31">
            <text:p><text:s/>1,3<text:s/></text:p>
          </table:table-cell>
          <table:table-cell office:value-type="float" office:value="1.2854673393234677" table:style-name="ce31">
            <text:p><text:s/>1,3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Demais atividades</text:p>
          </table:table-cell>
          <table:table-cell office:value-type="string" table:style-name="ce13">
            <text:p>%</text:p>
          </table:table-cell>
          <table:table-cell office:value-type="float" office:value="8.4906485692123248E-3" table:style-name="ce31">
            <text:p><text:s/>0,0<text:s/></text:p>
          </table:table-cell>
          <table:table-cell office:value-type="float" office:value="7.7754112147516465E-3" table:style-name="ce31">
            <text:p><text:s/>0,0<text:s/></text:p>
          </table:table-cell>
          <table:table-cell office:value-type="float" office:value="6.4173079303208869E-3" table:style-name="ce31">
            <text:p><text:s/>0,0<text:s/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articipação das Famílias no retorno total</text:p>
          </table:table-cell>
          <table:table-cell office:value-type="string" table:style-name="ce7">
            <text:p>%</text:p>
          </table:table-cell>
          <table:table-cell office:value-type="float" office:value="4.5149663587466672E-2" table:style-name="ce30">
            <text:p><text:s/>0,0<text:s/></text:p>
          </table:table-cell>
          <table:table-cell office:value-type="float" office:value="4.1848007940518912E-2" table:style-name="ce30">
            <text:p><text:s/>0,0<text:s/></text:p>
          </table:table-cell>
          <table:table-cell office:value-type="float" office:value="4.2786164741051784E-2" table:style-name="ce30">
            <text:p><text:s/>0,0<text:s/></text:p>
          </table:table-cell>
          <table:table-cell table:number-columns-repeated="16379"/>
        </table:table-row>
        <table:table-row table:style-name="ro1">
          <table:table-cell table:style-name="ce10"/>
          <table:table-cell table:style-name="ce13"/>
          <table:table-cell table:number-columns-repeated="3" table:style-name="ce30"/>
          <table:table-cell table:number-columns-repeated="16379"/>
        </table:table-row>
        <table:table-row table:style-name="ro1">
          <table:table-cell office:value-type="string" table:style-name="ce10">
            <text:p>Consumo total</text:p>
          </table:table-cell>
          <table:table-cell table:style-name="ce7"/>
          <table:table-cell table:number-columns-repeated="3" table:style-name="ce30"/>
          <table:table-cell table:number-columns-repeated="16379"/>
        </table:table-row>
        <table:table-row table:style-name="ro1">
          <table:table-cell office:value-type="string" table:style-name="ce10">
            <text:p>Participação das atividades econômicas no consumo total</text:p>
          </table:table-cell>
          <table:table-cell office:value-type="string" table:style-name="ce7">
            <text:p>%</text:p>
          </table:table-cell>
          <table:table-cell office:value-type="float" office:value="99.310638535475192" table:style-name="ce30">
            <text:p><text:s/>99,3<text:s/></text:p>
          </table:table-cell>
          <table:table-cell office:value-type="float" office:value="99.307418729573399" table:style-name="ce30">
            <text:p><text:s/>99,3<text:s/></text:p>
          </table:table-cell>
          <table:table-cell office:value-type="float" office:value="99.313509003342006" table:style-name="ce30">
            <text:p><text:s/>99,3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Agricultura, pecuária, produção florestal, pesca e aquicultura</text:p>
          </table:table-cell>
          <table:table-cell office:value-type="string" table:style-name="ce13">
            <text:p>%</text:p>
          </table:table-cell>
          <table:table-cell office:value-type="float" office:value="97.15813586130848" table:style-name="ce31">
            <text:p><text:s/>97,2<text:s/></text:p>
          </table:table-cell>
          <table:table-cell office:value-type="float" office:value="97.143225200732104" table:style-name="ce31">
            <text:p><text:s/>97,1<text:s/></text:p>
          </table:table-cell>
          <table:table-cell office:value-type="float" office:value="97.062521152297279" table:style-name="ce31">
            <text:p><text:s/>97,1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Indústrias extrativas</text:p>
          </table:table-cell>
          <table:table-cell office:value-type="string" table:style-name="ce13">
            <text:p>%</text:p>
          </table:table-cell>
          <table:table-cell office:value-type="float" office:value="8.5433717801215503E-2" table:style-name="ce31">
            <text:p><text:s/>0,1<text:s/></text:p>
          </table:table-cell>
          <table:table-cell office:value-type="float" office:value="8.8044613886370623E-2" table:style-name="ce31">
            <text:p><text:s/>0,1<text:s/></text:p>
          </table:table-cell>
          <table:table-cell office:value-type="float" office:value="8.948924718377195E-2" table:style-name="ce31">
            <text:p><text:s/>0,1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Indústrias de transformação e construção</text:p>
          </table:table-cell>
          <table:table-cell office:value-type="string" table:style-name="ce13">
            <text:p>%</text:p>
          </table:table-cell>
          <table:table-cell office:value-type="float" office:value="1.0483756635958388" table:style-name="ce31">
            <text:p><text:s/>1,0<text:s/></text:p>
          </table:table-cell>
          <table:table-cell office:value-type="float" office:value="1.0431494928531793" table:style-name="ce31">
            <text:p><text:s/>1,0<text:s/></text:p>
          </table:table-cell>
          <table:table-cell office:value-type="float" office:value="1.0383671809991093" table:style-name="ce31">
            <text:p><text:s/>1,0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Eletricidade e gás</text:p>
          </table:table-cell>
          <table:table-cell office:value-type="string" table:style-name="ce13">
            <text:p>%</text:p>
          </table:table-cell>
          <table:table-cell office:value-type="float" office:value="2.3491029727641746E-2" table:style-name="ce31">
            <text:p><text:s/>0,0<text:s/></text:p>
          </table:table-cell>
          <table:table-cell office:value-type="float" office:value="2.4925714682384255E-2" table:style-name="ce31">
            <text:p><text:s/>0,0<text:s/></text:p>
          </table:table-cell>
          <table:table-cell office:value-type="float" office:value="3.6687093316044028E-2" table:style-name="ce31">
            <text:p><text:s/>0,0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Água e esgoto</text:p>
          </table:table-cell>
          <table:table-cell office:value-type="string" table:style-name="ce13">
            <text:p>%</text:p>
          </table:table-cell>
          <table:table-cell office:value-type="float" office:value="0.88149891466928543" table:style-name="ce31">
            <text:p><text:s/>0,9<text:s/></text:p>
          </table:table-cell>
          <table:table-cell office:value-type="float" office:value="0.90589770753015442" table:style-name="ce31">
            <text:p><text:s/>0,9<text:s/></text:p>
          </table:table-cell>
          <table:table-cell office:value-type="float" office:value="0.99617131487348498" table:style-name="ce31">
            <text:p><text:s/>1,0<text:s/>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Demais atividades</text:p>
          </table:table-cell>
          <table:table-cell office:value-type="string" table:style-name="ce13">
            <text:p>%</text:p>
          </table:table-cell>
          <table:table-cell office:value-type="float" office:value="0.11370334837272422" table:style-name="ce31">
            <text:p><text:s/>0,1<text:s/></text:p>
          </table:table-cell>
          <table:table-cell office:value-type="float" office:value="0.1021759998891954" table:style-name="ce31">
            <text:p><text:s/>0,1<text:s/></text:p>
          </table:table-cell>
          <table:table-cell office:value-type="float" office:value="9.0273014672316618E-2" table:style-name="ce31">
            <text:p><text:s/>0,1<text:s/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articipação das Famílias no consumo total</text:p>
          </table:table-cell>
          <table:table-cell office:value-type="string" table:style-name="ce7">
            <text:p>%</text:p>
          </table:table-cell>
          <table:table-cell office:value-type="float" office:value="0.68936146452444158" table:style-name="ce30">
            <text:p><text:s/>0,7<text:s/></text:p>
          </table:table-cell>
          <table:table-cell office:value-type="float" office:value="0.69258127042649686" table:style-name="ce30">
            <text:p><text:s/>0,7<text:s/></text:p>
          </table:table-cell>
          <table:table-cell office:value-type="float" office:value="0.68649099665791491" table:style-name="ce30">
            <text:p><text:s/>0,7<text:s/>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7"/>
          <table:table-cell table:number-columns-repeated="3" table:style-name="ce15"/>
          <table:table-cell table:number-columns-repeated="16379"/>
        </table:table-row>
        <table:table-row table:style-name="ro1">
          <table:table-cell office:value-type="string" table:style-name="ce10">
            <text:p>Famílias</text:p>
          </table:table-cell>
          <table:table-cell table:style-name="ce16"/>
          <table:table-cell table:number-columns-repeated="3" table:style-name="ce17"/>
          <table:table-cell table:number-columns-repeated="16379"/>
        </table:table-row>
        <table:table-row table:style-name="ro1">
          <table:table-cell office:value-type="string" table:style-name="ce12">
            <text:p>Uso total da água pelas Famílias<text:s/><text:span text:style-name="T5">per capita</text:span><text:span text:style-name="T6"><text:s/>por dia</text:span></text:p>
          </table:table-cell>
          <table:table-cell office:value-type="string" table:style-name="ce13">
            <text:p>litros/habitante/dia</text:p>
          </table:table-cell>
          <table:table-cell office:value-type="float" office:value="115.99101992169433" table:style-name="ce18">
            <text:p>116</text:p>
          </table:table-cell>
          <table:table-cell office:value-type="float" office:value="117.23786800948255" table:style-name="ce18">
            <text:p>117</text:p>
          </table:table-cell>
          <table:table-cell office:value-type="float" office:value="117.52926764752935" table:style-name="ce18">
            <text:p>118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Índice de esgoto coletado das Famílias em relação ao uso de água</text:p>
          </table:table-cell>
          <table:table-cell office:value-type="string" table:style-name="ce13">
            <text:p>%</text:p>
          </table:table-cell>
          <table:table-cell office:value-type="float" office:value="57.76355104230003" table:style-name="ce29">
            <text:p>57,8</text:p>
          </table:table-cell>
          <table:table-cell office:value-type="float" office:value="58.952188725795587" table:style-name="ce29">
            <text:p>59,0</text:p>
          </table:table-cell>
          <table:table-cell office:value-type="float" office:value="58.814868827291193" table:style-name="ce29">
            <text:p>58,8</text:p>
          </table:table-cell>
          <table:table-cell table:number-columns-repeated="16379"/>
        </table:table-row>
        <table:table-row table:style-name="ro1">
          <table:table-cell table:number-columns-repeated="5" table:style-name="ce19"/>
          <table:table-cell table:number-columns-repeated="16379" table:style-name="ce14"/>
        </table:table-row>
        <table:table-row table:number-rows-repeated="1048521" table:style-name="ro2">
          <table:table-cell table:number-columns-repeated="16384"/>
        </table:table-row>
      </table:table>
      <table:table table:name="Ind_est_fís_Grandes_Regiões" table:style-name="ta1">
        <table:table-column table:style-name="co7" table:default-cell-style-name="ce14"/>
        <table:table-column table:style-name="co8" table:default-cell-style-name="ce13"/>
        <table:table-column table:style-name="co9" table:number-columns-repeated="2" table:default-cell-style-name="ce13"/>
        <table:table-column table:style-name="co3" table:number-columns-repeated="3" table:default-cell-style-name="ce20"/>
        <table:table-column table:style-name="co4" table:number-columns-repeated="249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251" table:default-cell-style-name="ce1"/>
        <table:table-row table:style-name="ro3">
          <table:table-cell office:value-type="string" table:number-columns-spanned="7" table:number-rows-spanned="1" table:style-name="ce32">
            <text:p>Indicadores de Estoques e Físicos: grandes regiões, 2020</text:p>
          </table:table-cell>
          <table:covered-table-cell table:number-columns-repeated="6"/>
          <table:table-cell table:number-columns-repeated="2" table:style-name="ce1"/>
          <table:table-cell table:style-name="ce21"/>
          <table:table-cell table:number-columns-repeated="16374"/>
        </table:table-row>
        <table:table-row table:style-name="ro4">
          <table:table-cell table:number-columns-repeated="7" table:style-name="ce7"/>
          <table:table-cell table:number-columns-repeated="16377" table:style-name="ce1"/>
        </table:table-row>
        <table:table-row table:style-name="ro5">
          <table:table-cell office:value-type="string" table:style-name="ce2">
            <text:p>Indicadores</text:p>
          </table:table-cell>
          <table:table-cell office:value-type="string" table:style-name="ce3">
            <text:p>Unidad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E</text:p>
          </table:table-cell>
          <table:table-cell office:value-type="string" table:style-name="ce3">
            <text:p>SE</text:p>
          </table:table-cell>
          <table:table-cell office:value-type="string" table:style-name="ce3">
            <text:p>S</text:p>
          </table:table-cell>
          <table:table-cell office:value-type="string" table:style-name="ce4">
            <text:p>CO</text:p>
          </table:table-cell>
          <table:table-cell table:number-columns-repeated="16377" table:style-name="ce1"/>
        </table:table-row>
        <table:table-row table:style-name="ro6">
          <table:table-cell table:number-columns-repeated="7" table:style-name="ce5"/>
          <table:table-cell table:number-columns-repeated="16377" table:style-name="ce1"/>
        </table:table-row>
        <table:table-row table:style-name="ro7">
          <table:table-cell office:value-type="string" table:style-name="ce6">
            <text:p>INDICADORES DE ESTOQUE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8">
          <table:table-cell office:value-type="string" table:style-name="ce8">
            <text:p>Total de Recursos Hídricos Renováveis (TRHR)</text:p>
          </table:table-cell>
          <table:table-cell office:value-type="string" table:style-name="ce9">
            <text:p>hm<text:span text:style-name="T1">3</text:span></text:p>
          </table:table-cell>
          <table:table-cell office:value-type="float" office:value="6195556" table:style-name="ce23">
            <text:p>6.195.556</text:p>
          </table:table-cell>
          <table:table-cell office:value-type="float" office:value="337681" table:style-name="ce23">
            <text:p>337.681</text:p>
          </table:table-cell>
          <table:table-cell office:value-type="float" office:value="314625" table:style-name="ce23">
            <text:p>314.625</text:p>
          </table:table-cell>
          <table:table-cell office:value-type="float" office:value="350670" table:style-name="ce23">
            <text:p>350.670</text:p>
          </table:table-cell>
          <table:table-cell office:value-type="float" office:value="495157" table:style-name="ce23">
            <text:p>495.157</text:p>
          </table:table-cell>
          <table:table-cell table:style-name="ce1"/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8">
            <text:p>Total de Recursos Hídricos Renováveis (TRHR)<text:s/><text:span text:style-name="T2">per capita</text:span></text:p>
          </table:table-cell>
          <table:table-cell office:value-type="string" table:style-name="ce9">
            <text:p>m<text:span text:style-name="T3">3</text:span><text:span text:style-name="T4">/habitante/ano</text:span></text:p>
          </table:table-cell>
          <table:table-cell office:value-type="float" office:value="331799.48085404967" table:style-name="ce23">
            <text:p>331.799</text:p>
          </table:table-cell>
          <table:table-cell office:value-type="float" office:value="5885.5852790946628" table:style-name="ce23">
            <text:p>5.886</text:p>
          </table:table-cell>
          <table:table-cell office:value-type="float" office:value="3534.6262491540488" table:style-name="ce23">
            <text:p>3.535</text:p>
          </table:table-cell>
          <table:table-cell office:value-type="float" office:value="11614.544959536888" table:style-name="ce23">
            <text:p>11.615</text:p>
          </table:table-cell>
          <table:table-cell office:value-type="float" office:value="30001.691074139879" table:style-name="ce23">
            <text:p>30.002</text:p>
          </table:table-cell>
          <table:table-cell table:style-name="ce1"/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8">
            <text:p>Índice de Retirada (IR) - Volume captado como proporção do TRHR</text:p>
          </table:table-cell>
          <table:table-cell office:value-type="string" table:style-name="ce9">
            <text:p>%</text:p>
          </table:table-cell>
          <table:table-cell office:value-type="float" office:value="0.8196012010944066" table:style-name="ce27">
            <text:p>0,8</text:p>
          </table:table-cell>
          <table:table-cell office:value-type="float" office:value="20.855948760891405" table:style-name="ce27">
            <text:p>20,9</text:p>
          </table:table-cell>
          <table:table-cell office:value-type="float" office:value="47.316397920358192" table:style-name="ce27">
            <text:p>47,3</text:p>
          </table:table-cell>
          <table:table-cell office:value-type="float" office:value="38.626585930975047" table:style-name="ce27">
            <text:p>38,6</text:p>
          </table:table-cell>
          <table:table-cell office:value-type="float" office:value="34.289308635353713" table:style-name="ce27">
            <text:p>34,3</text:p>
          </table:table-cell>
          <table:table-cell table:style-name="ce1"/>
          <table:table-cell table:style-name="ce22"/>
          <table:table-cell table:number-columns-repeated="16375" table:style-name="ce1"/>
        </table:table-row>
        <table:table-row table:style-name="ro3">
          <table:table-cell office:value-type="string" table:style-name="ce25">
            <text:p>Razão de dependência (RD) - Volume de entradas de outros países e/ou regiões a montante como proporção de TRHR</text:p>
          </table:table-cell>
          <table:table-cell office:value-type="string" table:style-name="ce9">
            <text:p>%</text:p>
          </table:table-cell>
          <table:table-cell office:value-type="float" office:value="47.669313294884269" table:style-name="ce27">
            <text:p>47,7</text:p>
          </table:table-cell>
          <table:table-cell office:value-type="float" office:value="38.4244301574563" table:style-name="ce27">
            <text:p>38,4</text:p>
          </table:table-cell>
          <table:table-cell office:value-type="float" office:value="17.149940405244337" table:style-name="ce27">
            <text:p>17,1</text:p>
          </table:table-cell>
          <table:table-cell office:value-type="float" office:value="36.051273276869992" table:style-name="ce27">
            <text:p>36,1</text:p>
          </table:table-cell>
          <table:table-cell office:value-type="float" office:value="25.528266792148752" table:style-name="ce27">
            <text:p>25,5</text:p>
          </table:table-cell>
          <table:table-cell table:style-name="ce1"/>
          <table:table-cell table:style-name="ce22"/>
          <table:table-cell table:number-columns-repeated="16375" table:style-name="ce1"/>
        </table:table-row>
        <table:table-row table:style-name="ro8">
          <table:table-cell table:number-columns-repeated="7" table:style-name="ce5"/>
          <table:table-cell table:number-columns-repeated="16377" table:style-name="ce1"/>
        </table:table-row>
        <table:table-row table:style-name="ro8">
          <table:table-cell office:value-type="string" table:style-name="ce6">
            <text:p>INDICADORES FÍSICOS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8">
          <table:table-cell office:value-type="string" table:style-name="ce10">
            <text:p>Retirada total de água</text:p>
          </table:table-cell>
          <table:table-cell table:style-name="ce7"/>
          <table:table-cell table:number-columns-repeated="5" table:style-name="ce28"/>
          <table:table-cell table:number-columns-repeated="16377" table:style-name="ce1"/>
        </table:table-row>
        <table:table-row table:style-name="ro8">
          <table:table-cell office:value-type="string" table:style-name="ce10">
            <text:p>Participação das atividades econômicas na retirada total</text:p>
          </table:table-cell>
          <table:table-cell office:value-type="string" table:style-name="ce7">
            <text:p>%</text:p>
          </table:table-cell>
          <table:table-cell office:value-type="float" office:value="99.976961150805792" table:style-name="ce30">
            <text:p><text:s/>100,0<text:s/></text:p>
          </table:table-cell>
          <table:table-cell office:value-type="float" office:value="99.913651673094648" table:style-name="ce30">
            <text:p><text:s/>99,9<text:s/></text:p>
          </table:table-cell>
          <table:table-cell office:value-type="float" office:value="99.991953682514279" table:style-name="ce30">
            <text:p><text:s/>100,0<text:s/></text:p>
          </table:table-cell>
          <table:table-cell office:value-type="float" office:value="99.981357863459664" table:style-name="ce30">
            <text:p><text:s/>100,0<text:s/></text:p>
          </table:table-cell>
          <table:table-cell office:value-type="float" office:value="99.994309729048098" table:style-name="ce30">
            <text:p><text:s/>100,0<text:s/></text:p>
          </table:table-cell>
          <table:table-cell table:number-columns-repeated="16377" table:style-name="ce1"/>
        </table:table-row>
        <table:table-row table:style-name="ro8">
          <table:table-cell office:value-type="string" table:style-name="ce12">
            <text:p>Agricultura, pecuária, produção florestal, pesca e aquicultura</text:p>
          </table:table-cell>
          <table:table-cell office:value-type="string" table:style-name="ce13">
            <text:p>%</text:p>
          </table:table-cell>
          <table:table-cell office:value-type="float" office:value="8.731620685029732" table:style-name="ce31">
            <text:p><text:s/>8,7<text:s/></text:p>
          </table:table-cell>
          <table:table-cell office:value-type="float" office:value="20.648492948618877" table:style-name="ce31">
            <text:p><text:s/>20,6<text:s/></text:p>
          </table:table-cell>
          <table:table-cell office:value-type="float" office:value="6.6364322055584717" table:style-name="ce31">
            <text:p><text:s/>6,6<text:s/></text:p>
          </table:table-cell>
          <table:table-cell office:value-type="float" office:value="26.998004810279802" table:style-name="ce31">
            <text:p><text:s/>27,0<text:s/></text:p>
          </table:table-cell>
          <table:table-cell office:value-type="float" office:value="22.176972458865304" table:style-name="ce31">
            <text:p><text:s/>22,2<text:s/></text:p>
          </table:table-cell>
          <table:table-cell table:number-columns-repeated="16377" table:style-name="ce1"/>
        </table:table-row>
        <table:table-row table:style-name="ro8">
          <table:table-cell office:value-type="string" table:style-name="ce12">
            <text:p>Indústrias extrativas</text:p>
          </table:table-cell>
          <table:table-cell office:value-type="string" table:style-name="ce13">
            <text:p>%</text:p>
          </table:table-cell>
          <table:table-cell office:value-type="float" office:value="5.1027392068924829E-2" table:style-name="ce31">
            <text:p><text:s/>0,1<text:s/></text:p>
          </table:table-cell>
          <table:table-cell office:value-type="float" office:value="6.2820536775452518E-3" table:style-name="ce31">
            <text:p><text:s/>0,0<text:s/></text:p>
          </table:table-cell>
          <table:table-cell office:value-type="float" office:value="2.6356173002630746E-2" table:style-name="ce31">
            <text:p><text:s/>0,0<text:s/></text:p>
          </table:table-cell>
          <table:table-cell office:value-type="float" office:value="1.0570873099115044E-2" table:style-name="ce31">
            <text:p><text:s/>0,0<text:s/></text:p>
          </table:table-cell>
          <table:table-cell office:value-type="float" office:value="4.4178830261402003E-3" table:style-name="ce31">
            <text:p><text:s/>0,0<text:s/></text:p>
          </table:table-cell>
          <table:table-cell table:number-columns-repeated="16377" table:style-name="ce1"/>
        </table:table-row>
        <table:table-row table:style-name="ro8">
          <table:table-cell office:value-type="string" table:style-name="ce12">
            <text:p>Indústrias de transformação e construção</text:p>
          </table:table-cell>
          <table:table-cell office:value-type="string" table:style-name="ce13">
            <text:p>%</text:p>
          </table:table-cell>
          <table:table-cell office:value-type="float" office:value="2.7594738143405153E-2" table:style-name="ce31">
            <text:p><text:s/>0,0<text:s/></text:p>
          </table:table-cell>
          <table:table-cell office:value-type="float" office:value="0.40461952830054515" table:style-name="ce31">
            <text:p><text:s/>0,4<text:s/></text:p>
          </table:table-cell>
          <table:table-cell office:value-type="float" office:value="0.13376283068883998" table:style-name="ce31">
            <text:p><text:s/>0,1<text:s/></text:p>
          </table:table-cell>
          <table:table-cell office:value-type="float" office:value="0.22287111427022346" table:style-name="ce31">
            <text:p><text:s/>0,2<text:s/></text:p>
          </table:table-cell>
          <table:table-cell office:value-type="float" office:value="0.10493236296747405" table:style-name="ce31">
            <text:p><text:s/>0,1<text:s/></text:p>
          </table:table-cell>
          <table:table-cell table:number-columns-repeated="16377" table:style-name="ce1"/>
        </table:table-row>
        <table:table-row table:style-name="ro8">
          <table:table-cell office:value-type="string" table:style-name="ce12">
            <text:p>Eletricidade e gás</text:p>
          </table:table-cell>
          <table:table-cell office:value-type="string" table:style-name="ce13">
            <text:p>%</text:p>
          </table:table-cell>
          <table:table-cell office:value-type="float" office:value="90.360345200036747" table:style-name="ce31">
            <text:p><text:s/>90,4<text:s/></text:p>
          </table:table-cell>
          <table:table-cell office:value-type="float" office:value="75.288738507659289" table:style-name="ce31">
            <text:p><text:s/>75,3<text:s/></text:p>
          </table:table-cell>
          <table:table-cell office:value-type="float" office:value="91.92518985296239" table:style-name="ce31">
            <text:p><text:s/>91,9<text:s/></text:p>
          </table:table-cell>
          <table:table-cell office:value-type="float" office:value="70.739206402234018" table:style-name="ce31">
            <text:p><text:s/>70,7<text:s/></text:p>
          </table:table-cell>
          <table:table-cell office:value-type="float" office:value="76.86924545677455" table:style-name="ce31">
            <text:p><text:s/>76,9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Água e esgoto</text:p>
          </table:table-cell>
          <table:table-cell office:value-type="string" table:style-name="ce13">
            <text:p>%</text:p>
          </table:table-cell>
          <table:table-cell office:value-type="float" office:value="0.80637313552696999" table:style-name="ce31">
            <text:p><text:s/>0,8<text:s/></text:p>
          </table:table-cell>
          <table:table-cell office:value-type="float" office:value="3.5655186348383929" table:style-name="ce31">
            <text:p><text:s/>3,6<text:s/></text:p>
          </table:table-cell>
          <table:table-cell office:value-type="float" office:value="1.270212620301943" table:style-name="ce31">
            <text:p><text:s/>1,3<text:s/></text:p>
          </table:table-cell>
          <table:table-cell office:value-type="float" office:value="2.0107046635765053" table:style-name="ce31">
            <text:p><text:s/>2,0<text:s/></text:p>
          </table:table-cell>
          <table:table-cell office:value-type="float" office:value="0.83874156741463923" table:style-name="ce31">
            <text:p><text:s/>0,8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Demais atividades</text:p>
          </table:table-cell>
          <table:table-cell office:value-type="string" table:style-name="ce13">
            <text:p>%</text:p>
          </table:table-cell>
          <table:table-cell office:value-type="float" office:value="0" table:style-name="ce31">
            <text:p><text:s/>-<text:s text:c="3"/></text:p>
          </table:table-cell>
          <table:table-cell office:value-type="float" office:value="0" table:style-name="ce31">
            <text:p><text:s/>-<text:s text:c="3"/></text:p>
          </table:table-cell>
          <table:table-cell office:value-type="float" office:value="0" table:style-name="ce31">
            <text:p><text:s/>-<text:s text:c="3"/></text:p>
          </table:table-cell>
          <table:table-cell office:value-type="float" office:value="0" table:style-name="ce31">
            <text:p><text:s/>-<text:s text:c="3"/></text:p>
          </table:table-cell>
          <table:table-cell office:value-type="float" office:value="0" table:style-name="ce31">
            <text:p><text:s/>-<text:s text:c="3"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Participação das Famílias na retirada total</text:p>
          </table:table-cell>
          <table:table-cell office:value-type="string" table:style-name="ce7">
            <text:p>%</text:p>
          </table:table-cell>
          <table:table-cell office:value-type="float" office:value="2.3038849194236457E-2" table:style-name="ce30">
            <text:p><text:s/>0,0<text:s/></text:p>
          </table:table-cell>
          <table:table-cell office:value-type="float" office:value="8.6348326905350437E-2" table:style-name="ce30">
            <text:p><text:s/>0,1<text:s/></text:p>
          </table:table-cell>
          <table:table-cell office:value-type="float" office:value="8.0463174857370572E-3" table:style-name="ce30">
            <text:p><text:s/>0,0<text:s/></text:p>
          </table:table-cell>
          <table:table-cell office:value-type="float" office:value="1.8642136540341595E-2" table:style-name="ce30">
            <text:p><text:s/>0,0<text:s/></text:p>
          </table:table-cell>
          <table:table-cell office:value-type="float" office:value="5.6902709518985633E-3" table:style-name="ce30">
            <text:p><text:s/>0,0<text:s/></text:p>
          </table:table-cell>
          <table:table-cell table:number-columns-repeated="16377"/>
        </table:table-row>
        <table:table-row table:style-name="ro8">
          <table:table-cell table:style-name="ce12"/>
          <table:table-cell table:style-name="ce13"/>
          <table:table-cell table:number-columns-repeated="5" table:style-name="ce30"/>
          <table:table-cell table:number-columns-repeated="16377"/>
        </table:table-row>
        <table:table-row table:style-name="ro8">
          <table:table-cell office:value-type="string" table:style-name="ce10">
            <text:p>Uso total da água</text:p>
          </table:table-cell>
          <table:table-cell table:style-name="ce7"/>
          <table:table-cell table:number-columns-repeated="5" table:style-name="ce30"/>
          <table:table-cell table:number-columns-repeated="16377"/>
        </table:table-row>
        <table:table-row table:style-name="ro8">
          <table:table-cell office:value-type="string" table:style-name="ce10">
            <text:p>Participação das atividades econômicas no uso total da água</text:p>
          </table:table-cell>
          <table:table-cell office:value-type="string" table:style-name="ce7">
            <text:p>%</text:p>
          </table:table-cell>
          <table:table-cell office:value-type="float" office:value="99.903413819859352" table:style-name="ce30">
            <text:p><text:s/>99,9<text:s/></text:p>
          </table:table-cell>
          <table:table-cell office:value-type="float" office:value="99.428947961719615" table:style-name="ce30">
            <text:p><text:s/>99,4<text:s/></text:p>
          </table:table-cell>
          <table:table-cell office:value-type="float" office:value="99.770851066045168" table:style-name="ce30">
            <text:p><text:s/>99,8<text:s/></text:p>
          </table:table-cell>
          <table:table-cell office:value-type="float" office:value="99.723510200708134" table:style-name="ce30">
            <text:p><text:s/>99,7<text:s/></text:p>
          </table:table-cell>
          <table:table-cell office:value-type="float" office:value="99.90401126471555" table:style-name="ce30">
            <text:p><text:s/>99,9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Agricultura, pecuária, produção florestal, pesca e aquicultura</text:p>
          </table:table-cell>
          <table:table-cell office:value-type="string" table:style-name="ce13">
            <text:p>%</text:p>
          </table:table-cell>
          <table:table-cell office:value-type="float" office:value="8.7350964064286938" table:style-name="ce31">
            <text:p><text:s/>8,7<text:s/></text:p>
          </table:table-cell>
          <table:table-cell office:value-type="float" office:value="20.731635113565115" table:style-name="ce31">
            <text:p><text:s/>20,7<text:s/></text:p>
          </table:table-cell>
          <table:table-cell office:value-type="float" office:value="6.6084659350990798" table:style-name="ce31">
            <text:p><text:s/>6,6<text:s/></text:p>
          </table:table-cell>
          <table:table-cell office:value-type="float" office:value="26.889725898044592" table:style-name="ce31">
            <text:p><text:s/>26,9<text:s/></text:p>
          </table:table-cell>
          <table:table-cell office:value-type="float" office:value="22.138035823967208" table:style-name="ce31">
            <text:p><text:s/>22,1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Indústrias extrativas</text:p>
          </table:table-cell>
          <table:table-cell office:value-type="string" table:style-name="ce13">
            <text:p>%</text:p>
          </table:table-cell>
          <table:table-cell office:value-type="float" office:value="5.112655686585748E-2" table:style-name="ce31">
            <text:p><text:s/>0,1<text:s/></text:p>
          </table:table-cell>
          <table:table-cell office:value-type="float" office:value="6.5991907347052077E-3" table:style-name="ce31">
            <text:p><text:s/>0,0<text:s/></text:p>
          </table:table-cell>
          <table:table-cell office:value-type="float" office:value="2.6544139548569969E-2" table:style-name="ce31">
            <text:p><text:s/>0,0<text:s/></text:p>
          </table:table-cell>
          <table:table-cell office:value-type="float" office:value="1.0545842818361481E-2" table:style-name="ce31">
            <text:p><text:s/>0,0<text:s/></text:p>
          </table:table-cell>
          <table:table-cell office:value-type="float" office:value="4.417621584517902E-3" table:style-name="ce31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Indústrias de transformação e construção</text:p>
          </table:table-cell>
          <table:table-cell office:value-type="string" table:style-name="ce13">
            <text:p>%</text:p>
          </table:table-cell>
          <table:table-cell office:value-type="float" office:value="2.9224234201449064E-2" table:style-name="ce31">
            <text:p><text:s/>0,0<text:s/></text:p>
          </table:table-cell>
          <table:table-cell office:value-type="float" office:value="0.40811447127121264" table:style-name="ce31">
            <text:p><text:s/>0,4<text:s/></text:p>
          </table:table-cell>
          <table:table-cell office:value-type="float" office:value="0.13949091833970279" table:style-name="ce31">
            <text:p><text:s/>0,1<text:s/></text:p>
          </table:table-cell>
          <table:table-cell office:value-type="float" office:value="0.23087546839877254" table:style-name="ce31">
            <text:p><text:s/>0,2<text:s/></text:p>
          </table:table-cell>
          <table:table-cell office:value-type="float" office:value="0.10629896060072885" table:style-name="ce31">
            <text:p><text:s/>0,1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Eletricidade e gás</text:p>
          </table:table-cell>
          <table:table-cell office:value-type="string" table:style-name="ce13">
            <text:p>%</text:p>
          </table:table-cell>
          <table:table-cell office:value-type="float" office:value="90.230423576695699" table:style-name="ce31">
            <text:p><text:s/>90,2<text:s/></text:p>
          </table:table-cell>
          <table:table-cell office:value-type="float" office:value="74.36131852167199" table:style-name="ce31">
            <text:p><text:s/>74,4<text:s/></text:p>
          </table:table-cell>
          <table:table-cell office:value-type="float" office:value="91.480642228326005" table:style-name="ce31">
            <text:p><text:s/>91,5<text:s/></text:p>
          </table:table-cell>
          <table:table-cell office:value-type="float" office:value="70.334882064748527" table:style-name="ce31">
            <text:p><text:s/>70,3<text:s/></text:p>
          </table:table-cell>
          <table:table-cell office:value-type="float" office:value="76.729797790837665" table:style-name="ce31">
            <text:p><text:s/>76,7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Água e esgoto</text:p>
          </table:table-cell>
          <table:table-cell office:value-type="string" table:style-name="ce13">
            <text:p>%</text:p>
          </table:table-cell>
          <table:table-cell office:value-type="float" office:value="0.82681688206244397" table:style-name="ce31">
            <text:p><text:s/>0,8<text:s/></text:p>
          </table:table-cell>
          <table:table-cell office:value-type="float" office:value="3.8141191897512234" table:style-name="ce31">
            <text:p><text:s/>3,8<text:s/></text:p>
          </table:table-cell>
          <table:table-cell office:value-type="float" office:value="1.4713108037179163" table:style-name="ce31">
            <text:p><text:s/>1,5<text:s/></text:p>
          </table:table-cell>
          <table:table-cell office:value-type="float" office:value="2.2050569221103618" table:style-name="ce31">
            <text:p><text:s/>2,2<text:s/></text:p>
          </table:table-cell>
          <table:table-cell office:value-type="float" office:value="0.90687185991921071" table:style-name="ce31">
            <text:p><text:s/>0,9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Demais atividades</text:p>
          </table:table-cell>
          <table:table-cell office:value-type="string" table:style-name="ce13">
            <text:p>%</text:p>
          </table:table-cell>
          <table:table-cell office:value-type="float" office:value="3.0726163605210174E-2" table:style-name="ce31">
            <text:p><text:s/>0,0<text:s/></text:p>
          </table:table-cell>
          <table:table-cell office:value-type="float" office:value="0.10716147472536941" table:style-name="ce31">
            <text:p><text:s/>0,1<text:s/></text:p>
          </table:table-cell>
          <table:table-cell office:value-type="float" office:value="4.4397041013902641E-2" table:style-name="ce31">
            <text:p><text:s/>0,0<text:s/></text:p>
          </table:table-cell>
          <table:table-cell office:value-type="float" office:value="5.2424004587520327E-2" table:style-name="ce31">
            <text:p><text:s/>0,1<text:s/></text:p>
          </table:table-cell>
          <table:table-cell office:value-type="float" office:value="1.8589207806232844E-2" table:style-name="ce31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Participação das Famílias no uso total da água</text:p>
          </table:table-cell>
          <table:table-cell office:value-type="string" table:style-name="ce7">
            <text:p>%</text:p>
          </table:table-cell>
          <table:table-cell office:value-type="float" office:value="9.6586180140651887E-2" table:style-name="ce30">
            <text:p><text:s/>0,1<text:s/></text:p>
          </table:table-cell>
          <table:table-cell office:value-type="float" office:value="0.57105203828040141" table:style-name="ce30">
            <text:p><text:s/>0,6<text:s/></text:p>
          </table:table-cell>
          <table:table-cell office:value-type="float" office:value="0.22914893395482647" table:style-name="ce30">
            <text:p><text:s/>0,2<text:s/></text:p>
          </table:table-cell>
          <table:table-cell office:value-type="float" office:value="0.27648979929187611" table:style-name="ce30">
            <text:p><text:s/>0,3<text:s/></text:p>
          </table:table-cell>
          <table:table-cell office:value-type="float" office:value="9.5988735284453133E-2" table:style-name="ce30">
            <text:p><text:s/>0,1<text:s/></text:p>
          </table:table-cell>
          <table:table-cell table:number-columns-repeated="16377"/>
        </table:table-row>
        <table:table-row table:style-name="ro8">
          <table:table-cell table:style-name="ce10"/>
          <table:table-cell table:style-name="ce7"/>
          <table:table-cell table:number-columns-repeated="5" table:style-name="ce30"/>
          <table:table-cell table:number-columns-repeated="16377"/>
        </table:table-row>
        <table:table-row table:style-name="ro8">
          <table:table-cell office:value-type="string" table:style-name="ce10">
            <text:p>Retorno total para o meio ambiente</text:p>
          </table:table-cell>
          <table:table-cell table:style-name="ce7"/>
          <table:table-cell table:number-columns-repeated="5" table:style-name="ce30"/>
          <table:table-cell table:number-columns-repeated="16377"/>
        </table:table-row>
        <table:table-row table:style-name="ro8">
          <table:table-cell office:value-type="string" table:style-name="ce10">
            <text:p>Participação das atividades econômicas no retorno total</text:p>
          </table:table-cell>
          <table:table-cell office:value-type="string" table:style-name="ce7">
            <text:p>%</text:p>
          </table:table-cell>
          <table:table-cell office:value-type="float" office:value="99.92999732449077" table:style-name="ce30">
            <text:p><text:s/>99,9<text:s/></text:p>
          </table:table-cell>
          <table:table-cell office:value-type="float" office:value="99.742713616452633" table:style-name="ce30">
            <text:p><text:s/>99,7<text:s/></text:p>
          </table:table-cell>
          <table:table-cell office:value-type="float" office:value="99.990058828392463" table:style-name="ce30">
            <text:p><text:s/>100,0<text:s/></text:p>
          </table:table-cell>
          <table:table-cell office:value-type="float" office:value="99.942851378528957" table:style-name="ce30">
            <text:p><text:s/>99,9<text:s/></text:p>
          </table:table-cell>
          <table:table-cell office:value-type="float" office:value="99.978480201248615" table:style-name="ce30">
            <text:p><text:s/>100,0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Agricultura, pecuária, produção florestal, pesca e aquicultura</text:p>
          </table:table-cell>
          <table:table-cell office:value-type="string" table:style-name="ce13">
            <text:p>%</text:p>
          </table:table-cell>
          <table:table-cell office:value-type="float" office:value="5.6499601426475747" table:style-name="ce31">
            <text:p><text:s/>5,6<text:s/></text:p>
          </table:table-cell>
          <table:table-cell office:value-type="float" office:value="10.071664988557497" table:style-name="ce31">
            <text:p><text:s/>10,1<text:s/></text:p>
          </table:table-cell>
          <table:table-cell office:value-type="float" office:value="2.6102994328105824" table:style-name="ce31">
            <text:p><text:s/>2,6<text:s/></text:p>
          </table:table-cell>
          <table:table-cell office:value-type="float" office:value="14.077085464565977" table:style-name="ce31">
            <text:p><text:s/>14,1<text:s/></text:p>
          </table:table-cell>
          <table:table-cell office:value-type="float" office:value="12.528414507766069" table:style-name="ce31">
            <text:p><text:s/>12,5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Indústrias extrativas</text:p>
          </table:table-cell>
          <table:table-cell office:value-type="string" table:style-name="ce13">
            <text:p>%</text:p>
          </table:table-cell>
          <table:table-cell office:value-type="float" office:value="3.6275829847523942E-2" table:style-name="ce31">
            <text:p><text:s/>0,0<text:s/></text:p>
          </table:table-cell>
          <table:table-cell office:value-type="float" office:value="3.6530422531227701E-3" table:style-name="ce31">
            <text:p><text:s/>0,0<text:s/></text:p>
          </table:table-cell>
          <table:table-cell office:value-type="float" office:value="2.0017017945511847E-2" table:style-name="ce31">
            <text:p><text:s/>0,0<text:s/></text:p>
          </table:table-cell>
          <table:table-cell office:value-type="float" office:value="9.2063034085302E-3" table:style-name="ce31">
            <text:p><text:s/>0,0<text:s/></text:p>
          </table:table-cell>
          <table:table-cell office:value-type="float" office:value="3.0138528839118647E-3" table:style-name="ce31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Indústrias de transformação e construção</text:p>
          </table:table-cell>
          <table:table-cell office:value-type="string" table:style-name="ce13">
            <text:p>%</text:p>
          </table:table-cell>
          <table:table-cell office:value-type="float" office:value="2.0748245151686235E-2" table:style-name="ce31">
            <text:p><text:s/>0,0<text:s/></text:p>
          </table:table-cell>
          <table:table-cell office:value-type="float" office:value="0.1615909789396642" table:style-name="ce31">
            <text:p><text:s/>0,2<text:s/></text:p>
          </table:table-cell>
          <table:table-cell office:value-type="float" office:value="6.2771077196104294E-2" table:style-name="ce31">
            <text:p><text:s/>0,1<text:s/></text:p>
          </table:table-cell>
          <table:table-cell office:value-type="float" office:value="0.18384100229445743" table:style-name="ce31">
            <text:p><text:s/>0,2<text:s/></text:p>
          </table:table-cell>
          <table:table-cell office:value-type="float" office:value="5.3641809836279933E-2" table:style-name="ce31">
            <text:p><text:s/>0,1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Eletricidade e gás</text:p>
          </table:table-cell>
          <table:table-cell office:value-type="string" table:style-name="ce13">
            <text:p>%</text:p>
          </table:table-cell>
          <table:table-cell office:value-type="float" office:value="93.515793161549382" table:style-name="ce31">
            <text:p><text:s/>93,5<text:s/></text:p>
          </table:table-cell>
          <table:table-cell office:value-type="float" office:value="86.444528561546292" table:style-name="ce31">
            <text:p><text:s/>86,4<text:s/></text:p>
          </table:table-cell>
          <table:table-cell office:value-type="float" office:value="96.110229052121952" table:style-name="ce31">
            <text:p><text:s/>96,1<text:s/></text:p>
          </table:table-cell>
          <table:table-cell office:value-type="float" office:value="83.584552667031247" table:style-name="ce31">
            <text:p><text:s/>83,6<text:s/></text:p>
          </table:table-cell>
          <table:table-cell office:value-type="float" office:value="86.525257058033986" table:style-name="ce31">
            <text:p><text:s/>86,5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Água e esgoto</text:p>
          </table:table-cell>
          <table:table-cell office:value-type="string" table:style-name="ce13">
            <text:p>%</text:p>
          </table:table-cell>
          <table:table-cell office:value-type="float" office:value="0.69720792074668381" table:style-name="ce31">
            <text:p><text:s/>0,7<text:s/></text:p>
          </table:table-cell>
          <table:table-cell office:value-type="float" office:value="3.0364196508172103" table:style-name="ce31">
            <text:p><text:s/>3,0<text:s/></text:p>
          </table:table-cell>
          <table:table-cell office:value-type="float" office:value="1.1832149550095419" table:style-name="ce31">
            <text:p><text:s/>1,2<text:s/></text:p>
          </table:table-cell>
          <table:table-cell office:value-type="float" office:value="2.0783306838319691" table:style-name="ce31">
            <text:p><text:s/>2,1<text:s/></text:p>
          </table:table-cell>
          <table:table-cell office:value-type="float" office:value="0.86570585849358017" table:style-name="ce31">
            <text:p><text:s/>0,9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Demais atividades</text:p>
          </table:table-cell>
          <table:table-cell office:value-type="string" table:style-name="ce13">
            <text:p>%</text:p>
          </table:table-cell>
          <table:table-cell office:value-type="float" office:value="1.0012024547933131E-2" table:style-name="ce31">
            <text:p><text:s/>0,0<text:s/></text:p>
          </table:table-cell>
          <table:table-cell office:value-type="float" office:value="2.4856394338841084E-2" table:style-name="ce31">
            <text:p><text:s/>0,0<text:s/></text:p>
          </table:table-cell>
          <table:table-cell office:value-type="float" office:value="3.5272933087779784E-3" table:style-name="ce31">
            <text:p><text:s/>0,0<text:s/></text:p>
          </table:table-cell>
          <table:table-cell office:value-type="float" office:value="9.8352573967843172E-3" table:style-name="ce31">
            <text:p><text:s/>0,0<text:s/></text:p>
          </table:table-cell>
          <table:table-cell office:value-type="float" office:value="2.4471142347801044E-3" table:style-name="ce31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Participação das Famílias no retorno total</text:p>
          </table:table-cell>
          <table:table-cell office:value-type="string" table:style-name="ce7">
            <text:p>%</text:p>
          </table:table-cell>
          <table:table-cell office:value-type="float" office:value="7.0002675509229548E-2" table:style-name="ce30">
            <text:p><text:s/>0,1<text:s/></text:p>
          </table:table-cell>
          <table:table-cell office:value-type="float" office:value="0.25728638354737204" table:style-name="ce30">
            <text:p><text:s/>0,3<text:s/></text:p>
          </table:table-cell>
          <table:table-cell office:value-type="float" office:value="9.9411716075231953E-3" table:style-name="ce30">
            <text:p><text:s/>0,0<text:s/></text:p>
          </table:table-cell>
          <table:table-cell office:value-type="float" office:value="5.7148621471051361E-2" table:style-name="ce30">
            <text:p><text:s/>0,1<text:s/></text:p>
          </table:table-cell>
          <table:table-cell office:value-type="float" office:value="2.1519798751376572E-2" table:style-name="ce30">
            <text:p><text:s/>0,0<text:s/></text:p>
          </table:table-cell>
          <table:table-cell table:number-columns-repeated="16377"/>
        </table:table-row>
        <table:table-row table:style-name="ro8">
          <table:table-cell table:style-name="ce10"/>
          <table:table-cell table:style-name="ce13"/>
          <table:table-cell table:number-columns-repeated="5" table:style-name="ce30"/>
          <table:table-cell table:number-columns-repeated="16377"/>
        </table:table-row>
        <table:table-row table:style-name="ro8">
          <table:table-cell office:value-type="string" table:style-name="ce10">
            <text:p>Consumo total</text:p>
          </table:table-cell>
          <table:table-cell table:style-name="ce7"/>
          <table:table-cell table:number-columns-repeated="5" table:style-name="ce30"/>
          <table:table-cell table:number-columns-repeated="16377"/>
        </table:table-row>
        <table:table-row table:style-name="ro8">
          <table:table-cell office:value-type="string" table:style-name="ce10">
            <text:p>Participação das atividades econômicas no consumo total</text:p>
          </table:table-cell>
          <table:table-cell office:value-type="string" table:style-name="ce7">
            <text:p>%</text:p>
          </table:table-cell>
          <table:table-cell office:value-type="float" office:value="99.593061731920869" table:formula="of:=['file://ibge.gov.br/dpe-conac/ContasAmbientais/SCEA%20%C1gua/Terceiras%20CEAA_2018_2020/arquivo%20de%20sa%EDda%20do%20algoritmo%20(an%E1lise%20resultados)/Insumos2018-2020.xlsx'#Indicadores_fís_site_regiões.C43]*100" table:style-name="ce30">
            <text:p><text:s/>99,6<text:s/></text:p>
          </table:table-cell>
          <table:table-cell office:value-type="float" office:value="99.031283399918237" table:formula="of:=['file://ibge.gov.br/dpe-conac/ContasAmbientais/SCEA%20%C1gua/Terceiras%20CEAA_2018_2020/arquivo%20de%20sa%EDda%20do%20algoritmo%20(an%E1lise%20resultados)/Insumos2018-2020.xlsx'#Indicadores_fís_site_regiões.D43]*100" table:style-name="ce30">
            <text:p><text:s/>99,0<text:s/></text:p>
          </table:table-cell>
          <table:table-cell office:value-type="float" office:value="98.704812516055028" table:formula="of:=['file://ibge.gov.br/dpe-conac/ContasAmbientais/SCEA%20%C1gua/Terceiras%20CEAA_2018_2020/arquivo%20de%20sa%EDda%20do%20algoritmo%20(an%E1lise%20resultados)/Insumos2018-2020.xlsx'#Indicadores_fís_site_regiões.E43]*100" table:style-name="ce30">
            <text:p><text:s/>98,7<text:s/></text:p>
          </table:table-cell>
          <table:table-cell office:value-type="float" office:value="99.570535147747208" table:formula="of:=['file://ibge.gov.br/dpe-conac/ContasAmbientais/SCEA%20%C1gua/Terceiras%20CEAA_2018_2020/arquivo%20de%20sa%EDda%20do%20algoritmo%20(an%E1lise%20resultados)/Insumos2018-2020.xlsx'#Indicadores_fís_site_regiões.F43]*100" table:style-name="ce30">
            <text:p><text:s/>99,6<text:s/></text:p>
          </table:table-cell>
          <table:table-cell office:value-type="float" office:value="99.798317832149934" table:formula="of:=['file://ibge.gov.br/dpe-conac/ContasAmbientais/SCEA%20%C1gua/Terceiras%20CEAA_2018_2020/arquivo%20de%20sa%EDda%20do%20algoritmo%20(an%E1lise%20resultados)/Insumos2018-2020.xlsx'#Indicadores_fís_site_regiões.G43]*100" table:style-name="ce30">
            <text:p><text:s/>99,8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Agricultura, pecuária, produção florestal, pesca e aquicultura</text:p>
          </table:table-cell>
          <table:table-cell office:value-type="string" table:style-name="ce13">
            <text:p>%</text:p>
          </table:table-cell>
          <table:table-cell office:value-type="float" office:value="97.391132168287655" table:formula="of:=['file://ibge.gov.br/dpe-conac/ContasAmbientais/SCEA%20%C1gua/Terceiras%20CEAA_2018_2020/arquivo%20de%20sa%EDda%20do%20algoritmo%20(an%E1lise%20resultados)/Insumos2018-2020.xlsx'#Indicadores_fís_site_regiões.C44]*100" table:style-name="ce31">
            <text:p><text:s/>97,4<text:s/></text:p>
          </table:table-cell>
          <table:table-cell office:value-type="float" office:value="94.583220811588049" table:formula="of:=['file://ibge.gov.br/dpe-conac/ContasAmbientais/SCEA%20%C1gua/Terceiras%20CEAA_2018_2020/arquivo%20de%20sa%EDda%20do%20algoritmo%20(an%E1lise%20resultados)/Insumos2018-2020.xlsx'#Indicadores_fís_site_regiões.D44]*100" table:style-name="ce31">
            <text:p><text:s/>94,6<text:s/></text:p>
          </table:table-cell>
          <table:table-cell office:value-type="float" office:value="95.140010236409893" table:formula="of:=['file://ibge.gov.br/dpe-conac/ContasAmbientais/SCEA%20%C1gua/Terceiras%20CEAA_2018_2020/arquivo%20de%20sa%EDda%20do%20algoritmo%20(an%E1lise%20resultados)/Insumos2018-2020.xlsx'#Indicadores_fís_site_regiões.E44]*100" table:style-name="ce31">
            <text:p><text:s/>95,1<text:s/></text:p>
          </table:table-cell>
          <table:table-cell office:value-type="float" office:value="98.410348039366824" table:formula="of:=['file://ibge.gov.br/dpe-conac/ContasAmbientais/SCEA%20%C1gua/Terceiras%20CEAA_2018_2020/arquivo%20de%20sa%EDda%20do%20algoritmo%20(an%E1lise%20resultados)/Insumos2018-2020.xlsx'#Indicadores_fís_site_regiões.F44]*100" table:style-name="ce31">
            <text:p><text:s/>98,4<text:s/></text:p>
          </table:table-cell>
          <table:table-cell office:value-type="float" office:value="98.995963666832893" table:formula="of:=['file://ibge.gov.br/dpe-conac/ContasAmbientais/SCEA%20%C1gua/Terceiras%20CEAA_2018_2020/arquivo%20de%20sa%EDda%20do%20algoritmo%20(an%E1lise%20resultados)/Insumos2018-2020.xlsx'#Indicadores_fís_site_regiões.G44]*100" table:style-name="ce31">
            <text:p><text:s/>99,0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Indústrias extrativas</text:p>
          </table:table-cell>
          <table:table-cell office:value-type="string" table:style-name="ce13">
            <text:p>%</text:p>
          </table:table-cell>
          <table:table-cell office:value-type="float" office:value="0.47747357559387105" table:formula="of:=['file://ibge.gov.br/dpe-conac/ContasAmbientais/SCEA%20%C1gua/Terceiras%20CEAA_2018_2020/arquivo%20de%20sa%EDda%20do%20algoritmo%20(an%E1lise%20resultados)/Insumos2018-2020.xlsx'#Indicadores_fís_site_regiões.C45]*100" table:style-name="ce31">
            <text:p><text:s/>0,5<text:s/></text:p>
          </table:table-cell>
          <table:table-cell office:value-type="float" office:value="2.516369525823927E-2" table:formula="of:=['file://ibge.gov.br/dpe-conac/ContasAmbientais/SCEA%20%C1gua/Terceiras%20CEAA_2018_2020/arquivo%20de%20sa%EDda%20do%20algoritmo%20(an%E1lise%20resultados)/Insumos2018-2020.xlsx'#Indicadores_fís_site_regiões.D45]*100" table:style-name="ce31">
            <text:p><text:s/>0,0<text:s/></text:p>
          </table:table-cell>
          <table:table-cell office:value-type="float" office:value="0.16661936936247482" table:formula="of:=['file://ibge.gov.br/dpe-conac/ContasAmbientais/SCEA%20%C1gua/Terceiras%20CEAA_2018_2020/arquivo%20de%20sa%EDda%20do%20algoritmo%20(an%E1lise%20resultados)/Insumos2018-2020.xlsx'#Indicadores_fís_site_regiões.E45]*100" table:style-name="ce31">
            <text:p><text:s/>0,2<text:s/></text:p>
          </table:table-cell>
          <table:table-cell office:value-type="float" office:value="1.8152396121602861E-2" table:formula="of:=['file://ibge.gov.br/dpe-conac/ContasAmbientais/SCEA%20%C1gua/Terceiras%20CEAA_2018_2020/arquivo%20de%20sa%EDda%20do%20algoritmo%20(an%E1lise%20resultados)/Insumos2018-2020.xlsx'#Indicadores_fís_site_regiões.F45]*100" table:style-name="ce31">
            <text:p><text:s/>0,0<text:s/></text:p>
          </table:table-cell>
          <table:table-cell office:value-type="float" office:value="1.5614469021232749E-2" table:formula="of:=['file://ibge.gov.br/dpe-conac/ContasAmbientais/SCEA%20%C1gua/Terceiras%20CEAA_2018_2020/arquivo%20de%20sa%EDda%20do%20algoritmo%20(an%E1lise%20resultados)/Insumos2018-2020.xlsx'#Indicadores_fís_site_regiões.G45]*100" table:style-name="ce31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Indústrias de transformação e construção</text:p>
          </table:table-cell>
          <table:table-cell office:value-type="string" table:style-name="ce13">
            <text:p>%</text:p>
          </table:table-cell>
          <table:table-cell office:value-type="float" office:value="0.26462207718294806" table:formula="of:=['file://ibge.gov.br/dpe-conac/ContasAmbientais/SCEA%20%C1gua/Terceiras%20CEAA_2018_2020/arquivo%20de%20sa%EDda%20do%20algoritmo%20(an%E1lise%20resultados)/Insumos2018-2020.xlsx'#Indicadores_fís_site_regiões.C46]*100" table:style-name="ce31">
            <text:p><text:s/>0,3<text:s/></text:p>
          </table:table-cell>
          <table:table-cell office:value-type="float" office:value="2.0721871906851272" table:formula="of:=['file://ibge.gov.br/dpe-conac/ContasAmbientais/SCEA%20%C1gua/Terceiras%20CEAA_2018_2020/arquivo%20de%20sa%EDda%20do%20algoritmo%20(an%E1lise%20resultados)/Insumos2018-2020.xlsx'#Indicadores_fís_site_regiões.D46]*100" table:style-name="ce31">
            <text:p><text:s/>2,1<text:s/></text:p>
          </table:table-cell>
          <table:table-cell office:value-type="float" office:value="1.7193715359799897" table:formula="of:=['file://ibge.gov.br/dpe-conac/ContasAmbientais/SCEA%20%C1gua/Terceiras%20CEAA_2018_2020/arquivo%20de%20sa%EDda%20do%20algoritmo%20(an%E1lise%20resultados)/Insumos2018-2020.xlsx'#Indicadores_fís_site_regiões.E46]*100" table:style-name="ce31">
            <text:p><text:s/>1,7<text:s/></text:p>
          </table:table-cell>
          <table:table-cell office:value-type="float" office:value="0.45778316636360455" table:formula="of:=['file://ibge.gov.br/dpe-conac/ContasAmbientais/SCEA%20%C1gua/Terceiras%20CEAA_2018_2020/arquivo%20de%20sa%EDda%20do%20algoritmo%20(an%E1lise%20resultados)/Insumos2018-2020.xlsx'#Indicadores_fís_site_regiões.F46]*100" table:style-name="ce31">
            <text:p><text:s/>0,5<text:s/></text:p>
          </table:table-cell>
          <table:table-cell office:value-type="float" office:value="0.51691364947471008" table:formula="of:=['file://ibge.gov.br/dpe-conac/ContasAmbientais/SCEA%20%C1gua/Terceiras%20CEAA_2018_2020/arquivo%20de%20sa%EDda%20do%20algoritmo%20(an%E1lise%20resultados)/Insumos2018-2020.xlsx'#Indicadores_fís_site_regiões.G46]*100" table:style-name="ce31">
            <text:p><text:s/>0,5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Eletricidade e gás</text:p>
          </table:table-cell>
          <table:table-cell office:value-type="string" table:style-name="ce13">
            <text:p>%</text:p>
          </table:table-cell>
          <table:table-cell office:value-type="float" office:value="6.8365010818967537E-2" table:formula="of:=['file://ibge.gov.br/dpe-conac/ContasAmbientais/SCEA%20%C1gua/Terceiras%20CEAA_2018_2020/arquivo%20de%20sa%EDda%20do%20algoritmo%20(an%E1lise%20resultados)/Insumos2018-2020.xlsx'#Indicadores_fís_site_regiões.C47]*100" table:style-name="ce31">
            <text:p><text:s/>0,1<text:s/></text:p>
          </table:table-cell>
          <table:table-cell office:value-type="float" office:value="9.8017205732854579E-2" table:formula="of:=['file://ibge.gov.br/dpe-conac/ContasAmbientais/SCEA%20%C1gua/Terceiras%20CEAA_2018_2020/arquivo%20de%20sa%EDda%20do%20algoritmo%20(an%E1lise%20resultados)/Insumos2018-2020.xlsx'#Indicadores_fís_site_regiões.D47]*100" table:style-name="ce31">
            <text:p><text:s/>0,1<text:s/></text:p>
          </table:table-cell>
          <table:table-cell office:value-type="float" office:value="2.7893314314694988E-2" table:formula="of:=['file://ibge.gov.br/dpe-conac/ContasAmbientais/SCEA%20%C1gua/Terceiras%20CEAA_2018_2020/arquivo%20de%20sa%EDda%20do%20algoritmo%20(an%E1lise%20resultados)/Insumos2018-2020.xlsx'#Indicadores_fís_site_regiões.E47]*100" table:style-name="ce31">
            <text:p><text:s/>0,0<text:s/></text:p>
          </table:table-cell>
          <table:table-cell office:value-type="float" office:value="4.4830570407973919E-2" table:formula="of:=['file://ibge.gov.br/dpe-conac/ContasAmbientais/SCEA%20%C1gua/Terceiras%20CEAA_2018_2020/arquivo%20de%20sa%EDda%20do%20algoritmo%20(an%E1lise%20resultados)/Insumos2018-2020.xlsx'#Indicadores_fís_site_regiões.F47]*100" table:style-name="ce31">
            <text:p><text:s/>0,0<text:s/></text:p>
          </table:table-cell>
          <table:table-cell office:value-type="float" office:value="2.6513695404236657E-3" table:formula="of:=['file://ibge.gov.br/dpe-conac/ContasAmbientais/SCEA%20%C1gua/Terceiras%20CEAA_2018_2020/arquivo%20de%20sa%EDda%20do%20algoritmo%20(an%E1lise%20resultados)/Insumos2018-2020.xlsx'#Indicadores_fís_site_regiões.G47]*100" table:style-name="ce31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Água e esgoto</text:p>
          </table:table-cell>
          <table:table-cell office:value-type="string" table:style-name="ce13">
            <text:p>%</text:p>
          </table:table-cell>
          <table:table-cell office:value-type="float" office:value="0.9429307661373163" table:formula="of:=['file://ibge.gov.br/dpe-conac/ContasAmbientais/SCEA%20%C1gua/Terceiras%20CEAA_2018_2020/arquivo%20de%20sa%EDda%20do%20algoritmo%20(an%E1lise%20resultados)/Insumos2018-2020.xlsx'#Indicadores_fís_site_regiões.C48]*100" table:style-name="ce31">
            <text:p><text:s/>0,9<text:s/></text:p>
          </table:table-cell>
          <table:table-cell office:value-type="float" office:value="2.0598957567641301" table:formula="of:=['file://ibge.gov.br/dpe-conac/ContasAmbientais/SCEA%20%C1gua/Terceiras%20CEAA_2018_2020/arquivo%20de%20sa%EDda%20do%20algoritmo%20(an%E1lise%20resultados)/Insumos2018-2020.xlsx'#Indicadores_fís_site_regiões.D48]*100" table:style-name="ce31">
            <text:p><text:s/>2,1<text:s/></text:p>
          </table:table-cell>
          <table:table-cell office:value-type="float" office:value="1.5825478105583868" table:formula="of:=['file://ibge.gov.br/dpe-conac/ContasAmbientais/SCEA%20%C1gua/Terceiras%20CEAA_2018_2020/arquivo%20de%20sa%EDda%20do%20algoritmo%20(an%E1lise%20resultados)/Insumos2018-2020.xlsx'#Indicadores_fís_site_regiões.E48]*100" table:style-name="ce31">
            <text:p><text:s/>1,6<text:s/></text:p>
          </table:table-cell>
          <table:table-cell office:value-type="float" office:value="0.5905294881389227" table:formula="of:=['file://ibge.gov.br/dpe-conac/ContasAmbientais/SCEA%20%C1gua/Terceiras%20CEAA_2018_2020/arquivo%20de%20sa%EDda%20do%20algoritmo%20(an%E1lise%20resultados)/Insumos2018-2020.xlsx'#Indicadores_fís_site_regiões.F48]*100" table:style-name="ce31">
            <text:p><text:s/>0,6<text:s/></text:p>
          </table:table-cell>
          <table:table-cell office:value-type="float" office:value="0.24551589129111578" table:formula="of:=['file://ibge.gov.br/dpe-conac/ContasAmbientais/SCEA%20%C1gua/Terceiras%20CEAA_2018_2020/arquivo%20de%20sa%EDda%20do%20algoritmo%20(an%E1lise%20resultados)/Insumos2018-2020.xlsx'#Indicadores_fís_site_regiões.G48]*100" table:style-name="ce31">
            <text:p><text:s/>0,2<text:s/>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Demais atividades</text:p>
          </table:table-cell>
          <table:table-cell office:value-type="string" table:style-name="ce13">
            <text:p>%</text:p>
          </table:table-cell>
          <table:table-cell office:value-type="float" office:value="0.4485381339001151" table:formula="of:=['file://ibge.gov.br/dpe-conac/ContasAmbientais/SCEA%20%C1gua/Terceiras%20CEAA_2018_2020/arquivo%20de%20sa%EDda%20do%20algoritmo%20(an%E1lise%20resultados)/Insumos2018-2020.xlsx'#Indicadores_fís_site_regiões.C49]*100" table:style-name="ce31">
            <text:p><text:s/>0,4<text:s/></text:p>
          </table:table-cell>
          <table:table-cell office:value-type="float" office:value="0.19279873988983812" table:formula="of:=['file://ibge.gov.br/dpe-conac/ContasAmbientais/SCEA%20%C1gua/Terceiras%20CEAA_2018_2020/arquivo%20de%20sa%EDda%20do%20algoritmo%20(an%E1lise%20resultados)/Insumos2018-2020.xlsx'#Indicadores_fís_site_regiões.D49]*100" table:style-name="ce31">
            <text:p><text:s/>0,2<text:s/></text:p>
          </table:table-cell>
          <table:table-cell office:value-type="float" office:value="6.8370249429586555E-2" table:formula="of:=['file://ibge.gov.br/dpe-conac/ContasAmbientais/SCEA%20%C1gua/Terceiras%20CEAA_2018_2020/arquivo%20de%20sa%EDda%20do%20algoritmo%20(an%E1lise%20resultados)/Insumos2018-2020.xlsx'#Indicadores_fís_site_regiões.E49]*100" table:style-name="ce31">
            <text:p><text:s/>0,1<text:s/></text:p>
          </table:table-cell>
          <table:table-cell office:value-type="float" office:value="4.8891487348280922E-2" table:formula="of:=['file://ibge.gov.br/dpe-conac/ContasAmbientais/SCEA%20%C1gua/Terceiras%20CEAA_2018_2020/arquivo%20de%20sa%EDda%20do%20algoritmo%20(an%E1lise%20resultados)/Insumos2018-2020.xlsx'#Indicadores_fís_site_regiões.F49]*100" table:style-name="ce31">
            <text:p><text:s/>0,0<text:s/></text:p>
          </table:table-cell>
          <table:table-cell office:value-type="float" office:value="2.165878598954931E-2" table:formula="of:=['file://ibge.gov.br/dpe-conac/ContasAmbientais/SCEA%20%C1gua/Terceiras%20CEAA_2018_2020/arquivo%20de%20sa%EDda%20do%20algoritmo%20(an%E1lise%20resultados)/Insumos2018-2020.xlsx'#Indicadores_fís_site_regiões.G49]*100" table:style-name="ce31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Participação das Famílias no consumo total</text:p>
          </table:table-cell>
          <table:table-cell office:value-type="string" table:style-name="ce7">
            <text:p>%</text:p>
          </table:table-cell>
          <table:table-cell office:value-type="float" office:value="0.40693826807911837" table:formula="of:=['file://ibge.gov.br/dpe-conac/ContasAmbientais/SCEA%20%C1gua/Terceiras%20CEAA_2018_2020/arquivo%20de%20sa%EDda%20do%20algoritmo%20(an%E1lise%20resultados)/Insumos2018-2020.xlsx'#Indicadores_fís_site_regiões.C50]*100" table:style-name="ce30">
            <text:p><text:s/>0,4<text:s/></text:p>
          </table:table-cell>
          <table:table-cell office:value-type="float" office:value="0.96871660008186655" table:formula="of:=['file://ibge.gov.br/dpe-conac/ContasAmbientais/SCEA%20%C1gua/Terceiras%20CEAA_2018_2020/arquivo%20de%20sa%EDda%20do%20algoritmo%20(an%E1lise%20resultados)/Insumos2018-2020.xlsx'#Indicadores_fís_site_regiões.D50]*100" table:style-name="ce30">
            <text:p><text:s/>1,0<text:s/></text:p>
          </table:table-cell>
          <table:table-cell office:value-type="float" office:value="1.2951874839450201" table:formula="of:=['file://ibge.gov.br/dpe-conac/ContasAmbientais/SCEA%20%C1gua/Terceiras%20CEAA_2018_2020/arquivo%20de%20sa%EDda%20do%20algoritmo%20(an%E1lise%20resultados)/Insumos2018-2020.xlsx'#Indicadores_fís_site_regiões.E50]*100" table:style-name="ce30">
            <text:p><text:s/>1,3<text:s/></text:p>
          </table:table-cell>
          <table:table-cell office:value-type="float" office:value="0.42946485225274067" table:formula="of:=['file://ibge.gov.br/dpe-conac/ContasAmbientais/SCEA%20%C1gua/Terceiras%20CEAA_2018_2020/arquivo%20de%20sa%EDda%20do%20algoritmo%20(an%E1lise%20resultados)/Insumos2018-2020.xlsx'#Indicadores_fís_site_regiões.F50]*100" table:style-name="ce30">
            <text:p><text:s/>0,4<text:s/></text:p>
          </table:table-cell>
          <table:table-cell office:value-type="float" office:value="0.20168216785014054" table:formula="of:=['file://ibge.gov.br/dpe-conac/ContasAmbientais/SCEA%20%C1gua/Terceiras%20CEAA_2018_2020/arquivo%20de%20sa%EDda%20do%20algoritmo%20(an%E1lise%20resultados)/Insumos2018-2020.xlsx'#Indicadores_fís_site_regiões.G50]*100" table:style-name="ce30">
            <text:p><text:s/>0,2<text:s/></text:p>
          </table:table-cell>
          <table:table-cell table:number-columns-repeated="16377"/>
        </table:table-row>
        <table:table-row table:style-name="ro8">
          <table:table-cell table:style-name="ce14"/>
          <table:table-cell table:number-columns-repeated="6" table:style-name="ce7"/>
          <table:table-cell table:number-columns-repeated="16377"/>
        </table:table-row>
        <table:table-row table:style-name="ro8">
          <table:table-cell office:value-type="string" table:style-name="ce10">
            <text:p>Famílias</text:p>
          </table:table-cell>
          <table:table-cell table:number-columns-repeated="6" table:style-name="ce16"/>
          <table:table-cell table:number-columns-repeated="16377"/>
        </table:table-row>
        <table:table-row table:style-name="ro8">
          <table:table-cell office:value-type="string" table:style-name="ce12">
            <text:p>Uso total da água pelas Famílias<text:s/><text:span text:style-name="T5">per capita</text:span><text:span text:style-name="T6"><text:s/>por dia</text:span></text:p>
          </table:table-cell>
          <table:table-cell office:value-type="string" table:style-name="ce5">
            <text:p>litros/habitante/dia</text:p>
          </table:table-cell>
          <table:table-cell office:value-type="float" office:value="78.741721582383533" table:style-name="ce18">
            <text:p>79</text:p>
          </table:table-cell>
          <table:table-cell office:value-type="float" office:value="85.354102931340464" table:style-name="ce18">
            <text:p>85</text:p>
          </table:table-cell>
          <table:table-cell office:value-type="float" office:value="144.26966356820333" table:style-name="ce18">
            <text:p>144</text:p>
          </table:table-cell>
          <table:table-cell office:value-type="float" office:value="122.14903227730014" table:style-name="ce18">
            <text:p>122</text:p>
          </table:table-cell>
          <table:table-cell office:value-type="float" office:value="120.59427283107603" table:style-name="ce18">
            <text:p>121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Índice de esgoto coletado das Famílias em relação ao uso de água</text:p>
          </table:table-cell>
          <table:table-cell office:value-type="string" table:style-name="ce13">
            <text:p>%</text:p>
          </table:table-cell>
          <table:table-cell office:value-type="float" office:value="15.86532146973898" table:style-name="ce29">
            <text:p>15,9</text:p>
          </table:table-cell>
          <table:table-cell office:value-type="float" office:value="39.603107563336891" table:style-name="ce29">
            <text:p>39,6</text:p>
          </table:table-cell>
          <table:table-cell office:value-type="float" office:value="71.370884908027904" table:style-name="ce29">
            <text:p>71,4</text:p>
          </table:table-cell>
          <table:table-cell office:value-type="float" office:value="58.861899720363077" table:style-name="ce29">
            <text:p>58,9</text:p>
          </table:table-cell>
          <table:table-cell office:value-type="float" office:value="56.713101582363414" table:style-name="ce29">
            <text:p>56,7</text:p>
          </table:table-cell>
          <table:table-cell table:number-columns-repeated="16377" table:style-name="ce14"/>
        </table:table-row>
        <table:table-row table:style-name="ro9">
          <table:table-cell table:number-columns-repeated="7" table:style-name="ce19"/>
          <table:table-cell table:number-columns-repeated="16377" table:style-name="ce14"/>
        </table:table-row>
        <table:table-row table:number-rows-repeated="1048521" table:style-name="ro2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VBP" table:style-name="ta2">
        <table:table-source xlink:href="file://ibge.gov.br/dpe-conac/ContasAmbientais/SCEA%20Água/Terceiras%20CEAA_2018_2020/arquivo%20de%20saída%20do%20algoritmo%20(análise%20resultados)/Insumos2018-2020.xlsx" table:table-name="VB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PPI_monetário" table:style-name="ta2">
        <table:table-source xlink:href="file://ibge.gov.br/dpe-conac/ContasAmbientais/SCEA%20Água/Terceiras%20CEAA_2018_2020/arquivo%20de%20saída%20do%20algoritmo%20(análise%20resultados)/Insumos2018-2020.xlsx" table:table-name="PPI_monetá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PPI_-_F" table:style-name="ta2">
        <table:table-source xlink:href="file://ibge.gov.br/dpe-conac/ContasAmbientais/SCEA%20Água/Terceiras%20CEAA_2018_2020/arquivo%20de%20saída%20do%20algoritmo%20(análise%20resultados)/Insumos2018-2020.xlsx" table:table-name="PPI_-_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VAB_BR" table:style-name="ta2">
        <table:table-source xlink:href="file://ibge.gov.br/dpe-conac/ContasAmbientais/SCEA%20Água/Terceiras%20CEAA_2018_2020/arquivo%20de%20saída%20do%20algoritmo%20(análise%20resultados)/Insumos2018-2020.xlsx" table:table-name="VAB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VAB_N" table:style-name="ta2">
        <table:table-source xlink:href="file://ibge.gov.br/dpe-conac/ContasAmbientais/SCEA%20Água/Terceiras%20CEAA_2018_2020/arquivo%20de%20saída%20do%20algoritmo%20(análise%20resultados)/Insumos2018-2020.xlsx" table:table-name="VAB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VAB_NE" table:style-name="ta2">
        <table:table-source xlink:href="file://ibge.gov.br/dpe-conac/ContasAmbientais/SCEA%20Água/Terceiras%20CEAA_2018_2020/arquivo%20de%20saída%20do%20algoritmo%20(análise%20resultados)/Insumos2018-2020.xlsx" table:table-name="VAB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VAB_SE" table:style-name="ta2">
        <table:table-source xlink:href="file://ibge.gov.br/dpe-conac/ContasAmbientais/SCEA%20Água/Terceiras%20CEAA_2018_2020/arquivo%20de%20saída%20do%20algoritmo%20(análise%20resultados)/Insumos2018-2020.xlsx" table:table-name="VAB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VAB_S" table:style-name="ta2">
        <table:table-source xlink:href="file://ibge.gov.br/dpe-conac/ContasAmbientais/SCEA%20Água/Terceiras%20CEAA_2018_2020/arquivo%20de%20saída%20do%20algoritmo%20(análise%20resultados)/Insumos2018-2020.xlsx" table:table-name="VAB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VAB_CO" table:style-name="ta2">
        <table:table-source xlink:href="file://ibge.gov.br/dpe-conac/ContasAmbientais/SCEA%20Água/Terceiras%20CEAA_2018_2020/arquivo%20de%20saída%20do%20algoritmo%20(análise%20resultados)/Insumos2018-2020.xlsx" table:table-name="VAB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_BR" table:style-name="ta2">
        <table:table-source xlink:href="file://ibge.gov.br/dpe-conac/ContasAmbientais/SCEA%20Água/Terceiras%20CEAA_2018_2020/arquivo%20de%20saída%20do%20algoritmo%20(análise%20resultados)/Insumos2018-2020.xlsx" table:table-name="Despesas_com_A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_N" table:style-name="ta2">
        <table:table-source xlink:href="file://ibge.gov.br/dpe-conac/ContasAmbientais/SCEA%20Água/Terceiras%20CEAA_2018_2020/arquivo%20de%20saída%20do%20algoritmo%20(análise%20resultados)/Insumos2018-2020.xlsx" table:table-name="Despesas_com_A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_NE" table:style-name="ta2">
        <table:table-source xlink:href="file://ibge.gov.br/dpe-conac/ContasAmbientais/SCEA%20Água/Terceiras%20CEAA_2018_2020/arquivo%20de%20saída%20do%20algoritmo%20(análise%20resultados)/Insumos2018-2020.xlsx" table:table-name="Despesas_com_A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_SE" table:style-name="ta2">
        <table:table-source xlink:href="file://ibge.gov.br/dpe-conac/ContasAmbientais/SCEA%20Água/Terceiras%20CEAA_2018_2020/arquivo%20de%20saída%20do%20algoritmo%20(análise%20resultados)/Insumos2018-2020.xlsx" table:table-name="Despesas_com_A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_S" table:style-name="ta2">
        <table:table-source xlink:href="file://ibge.gov.br/dpe-conac/ContasAmbientais/SCEA%20Água/Terceiras%20CEAA_2018_2020/arquivo%20de%20saída%20do%20algoritmo%20(análise%20resultados)/Insumos2018-2020.xlsx" table:table-name="Despesas_com_A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_CO" table:style-name="ta2">
        <table:table-source xlink:href="file://ibge.gov.br/dpe-conac/ContasAmbientais/SCEA%20Água/Terceiras%20CEAA_2018_2020/arquivo%20de%20saída%20do%20algoritmo%20(análise%20resultados)/Insumos2018-2020.xlsx" table:table-name="Despesas_com_A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E_BR" table:style-name="ta2">
        <table:table-source xlink:href="file://ibge.gov.br/dpe-conac/ContasAmbientais/SCEA%20Água/Terceiras%20CEAA_2018_2020/arquivo%20de%20saída%20do%20algoritmo%20(análise%20resultados)/Insumos2018-2020.xlsx" table:table-name="Despesas_com_E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E_N" table:style-name="ta2">
        <table:table-source xlink:href="file://ibge.gov.br/dpe-conac/ContasAmbientais/SCEA%20Água/Terceiras%20CEAA_2018_2020/arquivo%20de%20saída%20do%20algoritmo%20(análise%20resultados)/Insumos2018-2020.xlsx" table:table-name="Despesas_com_E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E_NE" table:style-name="ta2">
        <table:table-source xlink:href="file://ibge.gov.br/dpe-conac/ContasAmbientais/SCEA%20Água/Terceiras%20CEAA_2018_2020/arquivo%20de%20saída%20do%20algoritmo%20(análise%20resultados)/Insumos2018-2020.xlsx" table:table-name="Despesas_com_E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E_SE" table:style-name="ta2">
        <table:table-source xlink:href="file://ibge.gov.br/dpe-conac/ContasAmbientais/SCEA%20Água/Terceiras%20CEAA_2018_2020/arquivo%20de%20saída%20do%20algoritmo%20(análise%20resultados)/Insumos2018-2020.xlsx" table:table-name="Despesas_com_E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E_S" table:style-name="ta2">
        <table:table-source xlink:href="file://ibge.gov.br/dpe-conac/ContasAmbientais/SCEA%20Água/Terceiras%20CEAA_2018_2020/arquivo%20de%20saída%20do%20algoritmo%20(análise%20resultados)/Insumos2018-2020.xlsx" table:table-name="Despesas_com_E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E_CO" table:style-name="ta2">
        <table:table-source xlink:href="file://ibge.gov.br/dpe-conac/ContasAmbientais/SCEA%20Água/Terceiras%20CEAA_2018_2020/arquivo%20de%20saída%20do%20algoritmo%20(análise%20resultados)/Insumos2018-2020.xlsx" table:table-name="Despesas_com_E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&amp;E_BR" table:style-name="ta2">
        <table:table-source xlink:href="file://ibge.gov.br/dpe-conac/ContasAmbientais/SCEA%20Água/Terceiras%20CEAA_2018_2020/arquivo%20de%20saída%20do%20algoritmo%20(análise%20resultados)/Insumos2018-2020.xlsx" table:table-name="Despesas_com_A&amp;E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&amp;E_N" table:style-name="ta2">
        <table:table-source xlink:href="file://ibge.gov.br/dpe-conac/ContasAmbientais/SCEA%20Água/Terceiras%20CEAA_2018_2020/arquivo%20de%20saída%20do%20algoritmo%20(análise%20resultados)/Insumos2018-2020.xlsx" table:table-name="Despesas_com_A&amp;E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&amp;E_NE" table:style-name="ta2">
        <table:table-source xlink:href="file://ibge.gov.br/dpe-conac/ContasAmbientais/SCEA%20Água/Terceiras%20CEAA_2018_2020/arquivo%20de%20saída%20do%20algoritmo%20(análise%20resultados)/Insumos2018-2020.xlsx" table:table-name="Despesas_com_A&amp;E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&amp;E_SE" table:style-name="ta2">
        <table:table-source xlink:href="file://ibge.gov.br/dpe-conac/ContasAmbientais/SCEA%20Água/Terceiras%20CEAA_2018_2020/arquivo%20de%20saída%20do%20algoritmo%20(análise%20resultados)/Insumos2018-2020.xlsx" table:table-name="Despesas_com_A&amp;E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&amp;E_S" table:style-name="ta2">
        <table:table-source xlink:href="file://ibge.gov.br/dpe-conac/ContasAmbientais/SCEA%20Água/Terceiras%20CEAA_2018_2020/arquivo%20de%20saída%20do%20algoritmo%20(análise%20resultados)/Insumos2018-2020.xlsx" table:table-name="Despesas_com_A&amp;E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Despesas_com_A&amp;E_CO" table:style-name="ta2">
        <table:table-source xlink:href="file://ibge.gov.br/dpe-conac/ContasAmbientais/SCEA%20Água/Terceiras%20CEAA_2018_2020/arquivo%20de%20saída%20do%20algoritmo%20(análise%20resultados)/Insumos2018-2020.xlsx" table:table-name="Despesas_com_A&amp;E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BR" table:style-name="ta2">
        <table:table-source xlink:href="file://ibge.gov.br/dpe-conac/ContasAmbientais/SCEA%20Água/Terceiras%20CEAA_2018_2020/arquivo%20de%20saída%20do%20algoritmo%20(análise%20resultados)/Insumos2018-2020.xlsx" table:table-name="Retirada_total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N" table:style-name="ta2">
        <table:table-source xlink:href="file://ibge.gov.br/dpe-conac/ContasAmbientais/SCEA%20Água/Terceiras%20CEAA_2018_2020/arquivo%20de%20saída%20do%20algoritmo%20(análise%20resultados)/Insumos2018-2020.xlsx" table:table-name="Retirada_total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NE" table:style-name="ta2">
        <table:table-source xlink:href="file://ibge.gov.br/dpe-conac/ContasAmbientais/SCEA%20Água/Terceiras%20CEAA_2018_2020/arquivo%20de%20saída%20do%20algoritmo%20(análise%20resultados)/Insumos2018-2020.xlsx" table:table-name="Retirada_total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SE" table:style-name="ta2">
        <table:table-source xlink:href="file://ibge.gov.br/dpe-conac/ContasAmbientais/SCEA%20Água/Terceiras%20CEAA_2018_2020/arquivo%20de%20saída%20do%20algoritmo%20(análise%20resultados)/Insumos2018-2020.xlsx" table:table-name="Retirada_total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S" table:style-name="ta2">
        <table:table-source xlink:href="file://ibge.gov.br/dpe-conac/ContasAmbientais/SCEA%20Água/Terceiras%20CEAA_2018_2020/arquivo%20de%20saída%20do%20algoritmo%20(análise%20resultados)/Insumos2018-2020.xlsx" table:table-name="Retirada_total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CO" table:style-name="ta2">
        <table:table-source xlink:href="file://ibge.gov.br/dpe-conac/ContasAmbientais/SCEA%20Água/Terceiras%20CEAA_2018_2020/arquivo%20de%20saída%20do%20algoritmo%20(análise%20resultados)/Insumos2018-2020.xlsx" table:table-name="Retirada_total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uso_consuntivoBR" table:style-name="ta2">
        <table:table-source xlink:href="file://ibge.gov.br/dpe-conac/ContasAmbientais/SCEA%20Água/Terceiras%20CEAA_2018_2020/arquivo%20de%20saída%20do%20algoritmo%20(análise%20resultados)/Insumos2018-2020.xlsx" table:table-name="Retirada_total_uso_consuntivo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uso_consuntivoN" table:style-name="ta2">
        <table:table-source xlink:href="file://ibge.gov.br/dpe-conac/ContasAmbientais/SCEA%20Água/Terceiras%20CEAA_2018_2020/arquivo%20de%20saída%20do%20algoritmo%20(análise%20resultados)/Insumos2018-2020.xlsx" table:table-name="Retirada_total_uso_consuntiv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uso_consuntivoNE" table:style-name="ta2">
        <table:table-source xlink:href="file://ibge.gov.br/dpe-conac/ContasAmbientais/SCEA%20Água/Terceiras%20CEAA_2018_2020/arquivo%20de%20saída%20do%20algoritmo%20(análise%20resultados)/Insumos2018-2020.xlsx" table:table-name="Retirada_total_uso_consuntivo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uso_consuntivoSE" table:style-name="ta2">
        <table:table-source xlink:href="file://ibge.gov.br/dpe-conac/ContasAmbientais/SCEA%20Água/Terceiras%20CEAA_2018_2020/arquivo%20de%20saída%20do%20algoritmo%20(análise%20resultados)/Insumos2018-2020.xlsx" table:table-name="Retirada_total_uso_consuntivo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uso_consuntivoS" table:style-name="ta2">
        <table:table-source xlink:href="file://ibge.gov.br/dpe-conac/ContasAmbientais/SCEA%20Água/Terceiras%20CEAA_2018_2020/arquivo%20de%20saída%20do%20algoritmo%20(análise%20resultados)/Insumos2018-2020.xlsx" table:table-name="Retirada_total_uso_consuntiv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irada_total_uso_consuntivoCO" table:style-name="ta2">
        <table:table-source xlink:href="file://ibge.gov.br/dpe-conac/ContasAmbientais/SCEA%20Água/Terceiras%20CEAA_2018_2020/arquivo%20de%20saída%20do%20algoritmo%20(análise%20resultados)/Insumos2018-2020.xlsx" table:table-name="Retirada_total_uso_consuntivo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água_de_outras_atividadesB" table:style-name="ta2">
        <table:table-source xlink:href="file://ibge.gov.br/dpe-conac/ContasAmbientais/SCEA%20Água/Terceiras%20CEAA_2018_2020/arquivo%20de%20saída%20do%20algoritmo%20(análise%20resultados)/Insumos2018-2020.xlsx" table:table-name="Uso_água_de_outras_atividades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água_de_outras_atividadesN" table:style-name="ta2">
        <table:table-source xlink:href="file://ibge.gov.br/dpe-conac/ContasAmbientais/SCEA%20Água/Terceiras%20CEAA_2018_2020/arquivo%20de%20saída%20do%20algoritmo%20(análise%20resultados)/Insumos2018-2020.xlsx" table:table-name="Uso_água_de_outras_atividades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água_de_outras_atividadesNE" table:style-name="ta2">
        <table:table-source xlink:href="file://ibge.gov.br/dpe-conac/ContasAmbientais/SCEA%20Água/Terceiras%20CEAA_2018_2020/arquivo%20de%20saída%20do%20algoritmo%20(análise%20resultados)/Insumos2018-2020.xlsx" table:table-name="Uso_água_de_outras_atividades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água_de_outras_atividadesSE" table:style-name="ta2">
        <table:table-source xlink:href="file://ibge.gov.br/dpe-conac/ContasAmbientais/SCEA%20Água/Terceiras%20CEAA_2018_2020/arquivo%20de%20saída%20do%20algoritmo%20(análise%20resultados)/Insumos2018-2020.xlsx" table:table-name="Uso_água_de_outras_atividades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água_de_outras_atividadesS" table:style-name="ta2">
        <table:table-source xlink:href="file://ibge.gov.br/dpe-conac/ContasAmbientais/SCEA%20Água/Terceiras%20CEAA_2018_2020/arquivo%20de%20saída%20do%20algoritmo%20(análise%20resultados)/Insumos2018-2020.xlsx" table:table-name="Uso_água_de_outras_atividades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água_de_outras_atividadesCO" table:style-name="ta2">
        <table:table-source xlink:href="file://ibge.gov.br/dpe-conac/ContasAmbientais/SCEA%20Água/Terceiras%20CEAA_2018_2020/arquivo%20de%20saída%20do%20algoritmo%20(análise%20resultados)/Insumos2018-2020.xlsx" table:table-name="Uso_água_de_outras_atividades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de_água_tratada_BR" table:style-name="ta2">
        <table:table-source xlink:href="file://ibge.gov.br/dpe-conac/ContasAmbientais/SCEA%20Água/Terceiras%20CEAA_2018_2020/arquivo%20de%20saída%20do%20algoritmo%20(análise%20resultados)/Insumos2018-2020.xlsx" table:table-name="Uso_de_água_tratada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de_água_tratada_N" table:style-name="ta2">
        <table:table-source xlink:href="file://ibge.gov.br/dpe-conac/ContasAmbientais/SCEA%20Água/Terceiras%20CEAA_2018_2020/arquivo%20de%20saída%20do%20algoritmo%20(análise%20resultados)/Insumos2018-2020.xlsx" table:table-name="Uso_de_água_tratada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de_água_tratada_NE" table:style-name="ta2">
        <table:table-source xlink:href="file://ibge.gov.br/dpe-conac/ContasAmbientais/SCEA%20Água/Terceiras%20CEAA_2018_2020/arquivo%20de%20saída%20do%20algoritmo%20(análise%20resultados)/Insumos2018-2020.xlsx" table:table-name="Uso_de_água_tratada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de_água_tratada_SE" table:style-name="ta2">
        <table:table-source xlink:href="file://ibge.gov.br/dpe-conac/ContasAmbientais/SCEA%20Água/Terceiras%20CEAA_2018_2020/arquivo%20de%20saída%20do%20algoritmo%20(análise%20resultados)/Insumos2018-2020.xlsx" table:table-name="Uso_de_água_tratada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de_água_tratada_S" table:style-name="ta2">
        <table:table-source xlink:href="file://ibge.gov.br/dpe-conac/ContasAmbientais/SCEA%20Água/Terceiras%20CEAA_2018_2020/arquivo%20de%20saída%20do%20algoritmo%20(análise%20resultados)/Insumos2018-2020.xlsx" table:table-name="Uso_de_água_tratada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de_água_tratada_CO" table:style-name="ta2">
        <table:table-source xlink:href="file://ibge.gov.br/dpe-conac/ContasAmbientais/SCEA%20Água/Terceiras%20CEAA_2018_2020/arquivo%20de%20saída%20do%20algoritmo%20(análise%20resultados)/Insumos2018-2020.xlsx" table:table-name="Uso_de_água_tratada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de_água_por_tipo_de_origem" table:style-name="ta2">
        <table:table-source xlink:href="file://ibge.gov.br/dpe-conac/ContasAmbientais/SCEA%20Água/Terceiras%20CEAA_2018_2020/arquivo%20de%20saída%20do%20algoritmo%20(análise%20resultados)/Insumos2018-2020.xlsx" table:table-name="Uso_de_água_por_tipo_de_orig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total_BR" table:style-name="ta2">
        <table:table-source xlink:href="file://ibge.gov.br/dpe-conac/ContasAmbientais/SCEA%20Água/Terceiras%20CEAA_2018_2020/arquivo%20de%20saída%20do%20algoritmo%20(análise%20resultados)/Insumos2018-2020.xlsx" table:table-name="Uso_total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total_N" table:style-name="ta2">
        <table:table-source xlink:href="file://ibge.gov.br/dpe-conac/ContasAmbientais/SCEA%20Água/Terceiras%20CEAA_2018_2020/arquivo%20de%20saída%20do%20algoritmo%20(análise%20resultados)/Insumos2018-2020.xlsx" table:table-name="Uso_total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total_NE" table:style-name="ta2">
        <table:table-source xlink:href="file://ibge.gov.br/dpe-conac/ContasAmbientais/SCEA%20Água/Terceiras%20CEAA_2018_2020/arquivo%20de%20saída%20do%20algoritmo%20(análise%20resultados)/Insumos2018-2020.xlsx" table:table-name="Uso_total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total_SE" table:style-name="ta2">
        <table:table-source xlink:href="file://ibge.gov.br/dpe-conac/ContasAmbientais/SCEA%20Água/Terceiras%20CEAA_2018_2020/arquivo%20de%20saída%20do%20algoritmo%20(análise%20resultados)/Insumos2018-2020.xlsx" table:table-name="Uso_total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total_S" table:style-name="ta2">
        <table:table-source xlink:href="file://ibge.gov.br/dpe-conac/ContasAmbientais/SCEA%20Água/Terceiras%20CEAA_2018_2020/arquivo%20de%20saída%20do%20algoritmo%20(análise%20resultados)/Insumos2018-2020.xlsx" table:table-name="Uso_total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Uso_total_CO" table:style-name="ta2">
        <table:table-source xlink:href="file://ibge.gov.br/dpe-conac/ContasAmbientais/SCEA%20Água/Terceiras%20CEAA_2018_2020/arquivo%20de%20saída%20do%20algoritmo%20(análise%20resultados)/Insumos2018-2020.xlsx" table:table-name="Uso_total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Suprimento_BR" table:style-name="ta2">
        <table:table-source xlink:href="file://ibge.gov.br/dpe-conac/ContasAmbientais/SCEA%20Água/Terceiras%20CEAA_2018_2020/arquivo%20de%20saída%20do%20algoritmo%20(análise%20resultados)/Insumos2018-2020.xlsx" table:table-name="Suprimento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Suprimento_N" table:style-name="ta2">
        <table:table-source xlink:href="file://ibge.gov.br/dpe-conac/ContasAmbientais/SCEA%20Água/Terceiras%20CEAA_2018_2020/arquivo%20de%20saída%20do%20algoritmo%20(análise%20resultados)/Insumos2018-2020.xlsx" table:table-name="Suprimento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Suprimento_NE" table:style-name="ta2">
        <table:table-source xlink:href="file://ibge.gov.br/dpe-conac/ContasAmbientais/SCEA%20Água/Terceiras%20CEAA_2018_2020/arquivo%20de%20saída%20do%20algoritmo%20(análise%20resultados)/Insumos2018-2020.xlsx" table:table-name="Suprimento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Suprimento_SE" table:style-name="ta2">
        <table:table-source xlink:href="file://ibge.gov.br/dpe-conac/ContasAmbientais/SCEA%20Água/Terceiras%20CEAA_2018_2020/arquivo%20de%20saída%20do%20algoritmo%20(análise%20resultados)/Insumos2018-2020.xlsx" table:table-name="Suprimento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Suprimento_S" table:style-name="ta2">
        <table:table-source xlink:href="file://ibge.gov.br/dpe-conac/ContasAmbientais/SCEA%20Água/Terceiras%20CEAA_2018_2020/arquivo%20de%20saída%20do%20algoritmo%20(análise%20resultados)/Insumos2018-2020.xlsx" table:table-name="Suprimento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Suprimento_CO" table:style-name="ta2">
        <table:table-source xlink:href="file://ibge.gov.br/dpe-conac/ContasAmbientais/SCEA%20Água/Terceiras%20CEAA_2018_2020/arquivo%20de%20saída%20do%20algoritmo%20(análise%20resultados)/Insumos2018-2020.xlsx" table:table-name="Supriment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Águas_residuais_para_redes_BR" table:style-name="ta2">
        <table:table-source xlink:href="file://ibge.gov.br/dpe-conac/ContasAmbientais/SCEA%20Água/Terceiras%20CEAA_2018_2020/arquivo%20de%20saída%20do%20algoritmo%20(análise%20resultados)/Insumos2018-2020.xlsx" table:table-name="Águas_residuais_para_redes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Águas_residuais_para_redes_N" table:style-name="ta2">
        <table:table-source xlink:href="file://ibge.gov.br/dpe-conac/ContasAmbientais/SCEA%20Água/Terceiras%20CEAA_2018_2020/arquivo%20de%20saída%20do%20algoritmo%20(análise%20resultados)/Insumos2018-2020.xlsx" table:table-name="Águas_residuais_para_redes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Águas_residuais_para_redes_NE" table:style-name="ta2">
        <table:table-source xlink:href="file://ibge.gov.br/dpe-conac/ContasAmbientais/SCEA%20Água/Terceiras%20CEAA_2018_2020/arquivo%20de%20saída%20do%20algoritmo%20(análise%20resultados)/Insumos2018-2020.xlsx" table:table-name="Águas_residuais_para_redes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Águas_residuais_para_redes_SE" table:style-name="ta2">
        <table:table-source xlink:href="file://ibge.gov.br/dpe-conac/ContasAmbientais/SCEA%20Água/Terceiras%20CEAA_2018_2020/arquivo%20de%20saída%20do%20algoritmo%20(análise%20resultados)/Insumos2018-2020.xlsx" table:table-name="Águas_residuais_para_redes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Águas_residuais_para_redes_S" table:style-name="ta2">
        <table:table-source xlink:href="file://ibge.gov.br/dpe-conac/ContasAmbientais/SCEA%20Água/Terceiras%20CEAA_2018_2020/arquivo%20de%20saída%20do%20algoritmo%20(análise%20resultados)/Insumos2018-2020.xlsx" table:table-name="Águas_residuais_para_redes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Águas_residuais_para_redes_CO" table:style-name="ta2">
        <table:table-source xlink:href="file://ibge.gov.br/dpe-conac/ContasAmbientais/SCEA%20Água/Terceiras%20CEAA_2018_2020/arquivo%20de%20saída%20do%20algoritmo%20(análise%20resultados)/Insumos2018-2020.xlsx" table:table-name="Águas_residuais_para_redes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orno_para_o_meio_ambiente_BR" table:style-name="ta2">
        <table:table-source xlink:href="file://ibge.gov.br/dpe-conac/ContasAmbientais/SCEA%20Água/Terceiras%20CEAA_2018_2020/arquivo%20de%20saída%20do%20algoritmo%20(análise%20resultados)/Insumos2018-2020.xlsx" table:table-name="Retorno_para_o_meio_ambiente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orno_para_o_meio_ambiente_N" table:style-name="ta2">
        <table:table-source xlink:href="file://ibge.gov.br/dpe-conac/ContasAmbientais/SCEA%20Água/Terceiras%20CEAA_2018_2020/arquivo%20de%20saída%20do%20algoritmo%20(análise%20resultados)/Insumos2018-2020.xlsx" table:table-name="Retorno_para_o_meio_ambiente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orno_para_o_meio_ambiente_NE" table:style-name="ta2">
        <table:table-source xlink:href="file://ibge.gov.br/dpe-conac/ContasAmbientais/SCEA%20Água/Terceiras%20CEAA_2018_2020/arquivo%20de%20saída%20do%20algoritmo%20(análise%20resultados)/Insumos2018-2020.xlsx" table:table-name="Retorno_para_o_meio_ambiente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orno_para_o_meio_ambiente_SE" table:style-name="ta2">
        <table:table-source xlink:href="file://ibge.gov.br/dpe-conac/ContasAmbientais/SCEA%20Água/Terceiras%20CEAA_2018_2020/arquivo%20de%20saída%20do%20algoritmo%20(análise%20resultados)/Insumos2018-2020.xlsx" table:table-name="Retorno_para_o_meio_ambiente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orno_para_o_meio_ambiente_S" table:style-name="ta2">
        <table:table-source xlink:href="file://ibge.gov.br/dpe-conac/ContasAmbientais/SCEA%20Água/Terceiras%20CEAA_2018_2020/arquivo%20de%20saída%20do%20algoritmo%20(análise%20resultados)/Insumos2018-2020.xlsx" table:table-name="Retorno_para_o_meio_ambiente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Retorno_para_o_meio_ambiente_CO" table:style-name="ta2">
        <table:table-source xlink:href="file://ibge.gov.br/dpe-conac/ContasAmbientais/SCEA%20Água/Terceiras%20CEAA_2018_2020/arquivo%20de%20saída%20do%20algoritmo%20(análise%20resultados)/Insumos2018-2020.xlsx" table:table-name="Retorno_para_o_meio_ambiente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sumo_BR" table:style-name="ta2">
        <table:table-source xlink:href="file://ibge.gov.br/dpe-conac/ContasAmbientais/SCEA%20Água/Terceiras%20CEAA_2018_2020/arquivo%20de%20saída%20do%20algoritmo%20(análise%20resultados)/Insumos2018-2020.xlsx" table:table-name="Consumo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sumo_N" table:style-name="ta2">
        <table:table-source xlink:href="file://ibge.gov.br/dpe-conac/ContasAmbientais/SCEA%20Água/Terceiras%20CEAA_2018_2020/arquivo%20de%20saída%20do%20algoritmo%20(análise%20resultados)/Insumos2018-2020.xlsx" table:table-name="Consumo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sumo_NE" table:style-name="ta2">
        <table:table-source xlink:href="file://ibge.gov.br/dpe-conac/ContasAmbientais/SCEA%20Água/Terceiras%20CEAA_2018_2020/arquivo%20de%20saída%20do%20algoritmo%20(análise%20resultados)/Insumos2018-2020.xlsx" table:table-name="Consumo_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sumo_SE" table:style-name="ta2">
        <table:table-source xlink:href="file://ibge.gov.br/dpe-conac/ContasAmbientais/SCEA%20Água/Terceiras%20CEAA_2018_2020/arquivo%20de%20saída%20do%20algoritmo%20(análise%20resultados)/Insumos2018-2020.xlsx" table:table-name="Consumo_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sumo_S" table:style-name="ta2">
        <table:table-source xlink:href="file://ibge.gov.br/dpe-conac/ContasAmbientais/SCEA%20Água/Terceiras%20CEAA_2018_2020/arquivo%20de%20saída%20do%20algoritmo%20(análise%20resultados)/Insumos2018-2020.xlsx" table:table-name="Consumo_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sumo_CO" table:style-name="ta2">
        <table:table-source xlink:href="file://ibge.gov.br/dpe-conac/ContasAmbientais/SCEA%20Água/Terceiras%20CEAA_2018_2020/arquivo%20de%20saída%20do%20algoritmo%20(análise%20resultados)/Insumos2018-2020.xlsx" table:table-name="Consum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Eletr_e_gas_agua_e_esg_desag_BR" table:style-name="ta2">
        <table:table-source xlink:href="file://ibge.gov.br/dpe-conac/ContasAmbientais/SCEA%20Água/Terceiras%20CEAA_2018_2020/arquivo%20de%20saída%20do%20algoritmo%20(análise%20resultados)/Insumos2018-2020.xlsx" table:table-name="Eletr_e_gas_agua_e_esg_desag_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Elet_e_gas_agua_e_esg_desag_N" table:style-name="ta2">
        <table:table-source xlink:href="file://ibge.gov.br/dpe-conac/ContasAmbientais/SCEA%20Água/Terceiras%20CEAA_2018_2020/arquivo%20de%20saída%20do%20algoritmo%20(análise%20resultados)/Insumos2018-2020.xlsx" table:table-name="Elet_e_gas_agua_e_esg_desag_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Índice" table:style-name="ta2">
        <table:table-source xlink:href="file://ibge.gov.br/dpe-conac/ContasAmbientais/SCEA%20Água/Terceiras%20CEAA_2018_2020/arquivo%20de%20saída%20do%20algoritmo%20(análise%20resultados)/Insumos2018-2020.xlsx" table:table-name="Í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" table:style-name="ta2">
        <table:table-source xlink:href="file://ibge.gov.br/dpe-conac/ContasAmbientais/SCEA%20Água/Terceiras%20CEAA_2018_2020/arquivo%20de%20saída%20do%20algoritmo%20(análise%20resultados)/Insumos2018-2020.xlsx" table:table-name="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2" table:style-name="ta2">
        <table:table-source xlink:href="file://ibge.gov.br/dpe-conac/ContasAmbientais/SCEA%20Água/Terceiras%20CEAA_2018_2020/arquivo%20de%20saída%20do%20algoritmo%20(análise%20resultados)/Insumos2018-2020.xlsx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3" table:style-name="ta2">
        <table:table-source xlink:href="file://ibge.gov.br/dpe-conac/ContasAmbientais/SCEA%20Água/Terceiras%20CEAA_2018_2020/arquivo%20de%20saída%20do%20algoritmo%20(análise%20resultados)/Insumos2018-2020.xlsx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4" table:style-name="ta2">
        <table:table-source xlink:href="file://ibge.gov.br/dpe-conac/ContasAmbientais/SCEA%20Água/Terceiras%20CEAA_2018_2020/arquivo%20de%20saída%20do%20algoritmo%20(análise%20resultados)/Insumos2018-2020.xlsx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5" table:style-name="ta2">
        <table:table-source xlink:href="file://ibge.gov.br/dpe-conac/ContasAmbientais/SCEA%20Água/Terceiras%20CEAA_2018_2020/arquivo%20de%20saída%20do%20algoritmo%20(análise%20resultados)/Insumos2018-2020.xlsx" table:table-name="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6" table:style-name="ta2">
        <table:table-source xlink:href="file://ibge.gov.br/dpe-conac/ContasAmbientais/SCEA%20Água/Terceiras%20CEAA_2018_2020/arquivo%20de%20saída%20do%20algoritmo%20(análise%20resultados)/Insumos2018-2020.xlsx" table:table-name="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7" table:style-name="ta2">
        <table:table-source xlink:href="file://ibge.gov.br/dpe-conac/ContasAmbientais/SCEA%20Água/Terceiras%20CEAA_2018_2020/arquivo%20de%20saída%20do%20algoritmo%20(análise%20resultados)/Insumos2018-2020.xlsx" table:table-name="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8" table:style-name="ta2">
        <table:table-source xlink:href="file://ibge.gov.br/dpe-conac/ContasAmbientais/SCEA%20Água/Terceiras%20CEAA_2018_2020/arquivo%20de%20saída%20do%20algoritmo%20(análise%20resultados)/Insumos2018-2020.xlsx" table:table-name="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9" table:style-name="ta2">
        <table:table-source xlink:href="file://ibge.gov.br/dpe-conac/ContasAmbientais/SCEA%20Água/Terceiras%20CEAA_2018_2020/arquivo%20de%20saída%20do%20algoritmo%20(análise%20resultados)/Insumos2018-2020.xlsx" table:table-name="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0" table:style-name="ta2">
        <table:table-source xlink:href="file://ibge.gov.br/dpe-conac/ContasAmbientais/SCEA%20Água/Terceiras%20CEAA_2018_2020/arquivo%20de%20saída%20do%20algoritmo%20(análise%20resultados)/Insumos2018-2020.xlsx" table:table-name="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1" table:style-name="ta2">
        <table:table-source xlink:href="file://ibge.gov.br/dpe-conac/ContasAmbientais/SCEA%20Água/Terceiras%20CEAA_2018_2020/arquivo%20de%20saída%20do%20algoritmo%20(análise%20resultados)/Insumos2018-2020.xlsx" table:table-name="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2" table:style-name="ta2">
        <table:table-source xlink:href="file://ibge.gov.br/dpe-conac/ContasAmbientais/SCEA%20Água/Terceiras%20CEAA_2018_2020/arquivo%20de%20saída%20do%20algoritmo%20(análise%20resultados)/Insumos2018-2020.xlsx" table:table-name="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3" table:style-name="ta2">
        <table:table-source xlink:href="file://ibge.gov.br/dpe-conac/ContasAmbientais/SCEA%20Água/Terceiras%20CEAA_2018_2020/arquivo%20de%20saída%20do%20algoritmo%20(análise%20resultados)/Insumos2018-2020.xlsx" table:table-name="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4" table:style-name="ta2">
        <table:table-source xlink:href="file://ibge.gov.br/dpe-conac/ContasAmbientais/SCEA%20Água/Terceiras%20CEAA_2018_2020/arquivo%20de%20saída%20do%20algoritmo%20(análise%20resultados)/Insumos2018-2020.xlsx" table:table-name="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5" table:style-name="ta2">
        <table:table-source xlink:href="file://ibge.gov.br/dpe-conac/ContasAmbientais/SCEA%20Água/Terceiras%20CEAA_2018_2020/arquivo%20de%20saída%20do%20algoritmo%20(análise%20resultados)/Insumos2018-2020.xlsx" table:table-name="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6" table:style-name="ta2">
        <table:table-source xlink:href="file://ibge.gov.br/dpe-conac/ContasAmbientais/SCEA%20Água/Terceiras%20CEAA_2018_2020/arquivo%20de%20saída%20do%20algoritmo%20(análise%20resultados)/Insumos2018-2020.xlsx" table:table-name="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7" table:style-name="ta2">
        <table:table-source xlink:href="file://ibge.gov.br/dpe-conac/ContasAmbientais/SCEA%20Água/Terceiras%20CEAA_2018_2020/arquivo%20de%20saída%20do%20algoritmo%20(análise%20resultados)/Insumos2018-2020.xlsx" table:table-name="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18" table:style-name="ta2">
        <table:table-source xlink:href="file://ibge.gov.br/dpe-conac/ContasAmbientais/SCEA%20Água/Terceiras%20CEAA_2018_2020/arquivo%20de%20saída%20do%20algoritmo%20(análise%20resultados)/Insumos2018-2020.xlsx" table:table-name="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Indicadores_informe" table:style-name="ta2">
        <table:table-source xlink:href="file://ibge.gov.br/dpe-conac/ContasAmbientais/SCEA%20Água/Terceiras%20CEAA_2018_2020/arquivo%20de%20saída%20do%20algoritmo%20(análise%20resultados)/Insumos2018-2020.xlsx" table:table-name="Indicadores_inform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Indicadores_informe_regiões" table:style-name="ta2">
        <table:table-source xlink:href="file://ibge.gov.br/dpe-conac/ContasAmbientais/SCEA%20Água/Terceiras%20CEAA_2018_2020/arquivo%20de%20saída%20do%20algoritmo%20(análise%20resultados)/Insumos2018-2020.xlsx" table:table-name="Indicadores_informe_regiõ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Indicadores_híb_site" table:style-name="ta2">
        <table:table-source xlink:href="file://ibge.gov.br/dpe-conac/ContasAmbientais/SCEA%20Água/Terceiras%20CEAA_2018_2020/arquivo%20de%20saída%20do%20algoritmo%20(análise%20resultados)/Insumos2018-2020.xlsx" table:table-name="Indicadores_híb_sit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Indicadores_fís_site" table:style-name="ta2">
        <table:table-source xlink:href="file://ibge.gov.br/dpe-conac/ContasAmbientais/SCEA%20Água/Terceiras%20CEAA_2018_2020/arquivo%20de%20saída%20do%20algoritmo%20(análise%20resultados)/Insumos2018-2020.xlsx" table:table-name="Indicadores_fís_sit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Indicadores_híb_site_regiões" table:style-name="ta2">
        <table:table-source xlink:href="file://ibge.gov.br/dpe-conac/ContasAmbientais/SCEA%20Água/Terceiras%20CEAA_2018_2020/arquivo%20de%20saída%20do%20algoritmo%20(análise%20resultados)/Insumos2018-2020.xlsx" table:table-name="Indicadores_híb_site_regiõ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Indicadores_fís_site_regiões" table:style-name="ta2">
        <table:table-source xlink:href="file://ibge.gov.br/dpe-conac/ContasAmbientais/SCEA%20Água/Terceiras%20CEAA_2018_2020/arquivo%20de%20saída%20do%20algoritmo%20(análise%20resultados)/Insumos2018-2020.xlsx" table:table-name="Indicadores_fís_site_regiões" table:mode="copy-results-only"/>
        <table:table-column/>
        <table:table-row table:number-rows-repeated="42">
          <table:table-cell table:number-columns-repeated="16384"/>
        </table:table-row>
        <table:table-row>
          <table:table-cell table:number-columns-repeated="2"/>
          <table:table-cell office:value-type="float" office:value="0.99593061731920873"/>
          <table:table-cell office:value-type="float" office:value="0.99031283399918235"/>
          <table:table-cell office:value-type="float" office:value="0.98704812516055029"/>
          <table:table-cell office:value-type="float" office:value="0.99570535147747208"/>
          <table:table-cell office:value-type="float" office:value="0.9979831783214993"/>
          <table:table-cell table:number-columns-repeated="16377"/>
        </table:table-row>
        <table:table-row>
          <table:table-cell table:number-columns-repeated="2"/>
          <table:table-cell office:value-type="float" office:value="0.97391132168287653"/>
          <table:table-cell office:value-type="float" office:value="0.94583220811588042"/>
          <table:table-cell office:value-type="float" office:value="0.951400102364099"/>
          <table:table-cell office:value-type="float" office:value="0.98410348039366824"/>
          <table:table-cell office:value-type="float" office:value="0.98995963666832898"/>
          <table:table-cell table:number-columns-repeated="16377"/>
        </table:table-row>
        <table:table-row>
          <table:table-cell table:number-columns-repeated="2"/>
          <table:table-cell office:value-type="float" office:value="4.7747357559387105E-3"/>
          <table:table-cell office:value-type="float" office:value="2.516369525823927E-4"/>
          <table:table-cell office:value-type="float" office:value="1.6661936936247482E-3"/>
          <table:table-cell office:value-type="float" office:value="1.8152396121602862E-4"/>
          <table:table-cell office:value-type="float" office:value="1.5614469021232749E-4"/>
          <table:table-cell table:number-columns-repeated="16377"/>
        </table:table-row>
        <table:table-row>
          <table:table-cell table:number-columns-repeated="2"/>
          <table:table-cell office:value-type="float" office:value="2.6462207718294804E-3"/>
          <table:table-cell office:value-type="float" office:value="2.0721871906851271E-2"/>
          <table:table-cell office:value-type="float" office:value="1.7193715359799897E-2"/>
          <table:table-cell office:value-type="float" office:value="4.5778316636360455E-3"/>
          <table:table-cell office:value-type="float" office:value="5.1691364947471013E-3"/>
          <table:table-cell table:number-columns-repeated="16377"/>
        </table:table-row>
        <table:table-row>
          <table:table-cell table:number-columns-repeated="2"/>
          <table:table-cell office:value-type="float" office:value="6.8365010818967537E-4"/>
          <table:table-cell office:value-type="float" office:value="9.8017205732854585E-4"/>
          <table:table-cell office:value-type="float" office:value="2.7893314314694989E-4"/>
          <table:table-cell office:value-type="float" office:value="4.483057040797392E-4"/>
          <table:table-cell office:value-type="float" office:value="2.6513695404236655E-5"/>
          <table:table-cell table:number-columns-repeated="16377"/>
        </table:table-row>
        <table:table-row>
          <table:table-cell table:number-columns-repeated="2"/>
          <table:table-cell office:value-type="float" office:value="9.4293076613731625E-3"/>
          <table:table-cell office:value-type="float" office:value="2.05989575676413E-2"/>
          <table:table-cell office:value-type="float" office:value="1.5825478105583868E-2"/>
          <table:table-cell office:value-type="float" office:value="5.9052948813892265E-3"/>
          <table:table-cell office:value-type="float" office:value="2.4551589129111579E-3"/>
          <table:table-cell table:number-columns-repeated="16377"/>
        </table:table-row>
        <table:table-row>
          <table:table-cell table:number-columns-repeated="2"/>
          <table:table-cell office:value-type="float" office:value="4.485381339001151E-3"/>
          <table:table-cell office:value-type="float" office:value="1.9279873988983813E-3"/>
          <table:table-cell office:value-type="float" office:value="6.8370249429586553E-4"/>
          <table:table-cell office:value-type="float" office:value="4.8891487348280921E-4"/>
          <table:table-cell office:value-type="float" office:value="2.165878598954931E-4"/>
          <table:table-cell table:number-columns-repeated="16377"/>
        </table:table-row>
        <table:table-row>
          <table:table-cell table:number-columns-repeated="2"/>
          <table:table-cell office:value-type="float" office:value="4.0693826807911837E-3"/>
          <table:table-cell office:value-type="float" office:value="9.6871660008186651E-3"/>
          <table:table-cell office:value-type="float" office:value="1.2951874839450202E-2"/>
          <table:table-cell office:value-type="float" office:value="4.2946485225274066E-3"/>
          <table:table-cell office:value-type="float" office:value="2.0168216785014055E-3"/>
          <table:table-cell table:number-columns-repeated="16377"/>
        </table:table-row>
        <table:table-row table:number-rows-repeated="1048526">
          <table:table-cell table:number-columns-repeated="16377"/>
        </table:table-row>
      </table:table>
      <table:table table:name="'file://ibge.gov.br/dpe-conac/ContasAmbientais/SCEA%20Água/Terceiras%20CEAA_2018_2020/arquivo%20de%20saída%20do%20algoritmo%20(análise%20resultados)/Insumos2018-2020.xlsx'#População" table:style-name="ta2">
        <table:table-source xlink:href="file://ibge.gov.br/dpe-conac/ContasAmbientais/SCEA%20Água/Terceiras%20CEAA_2018_2020/arquivo%20de%20saída%20do%20algoritmo%20(análise%20resultados)/Insumos2018-2020.xlsx" table:table-name="Populaçã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VAB_IV" table:style-name="ta2">
        <table:table-source xlink:href="file://ibge.gov.br/dpe-conac/ContasAmbientais/SCEA%20Água/Terceiras%20CEAA_2018_2020/arquivo%20de%20saída%20do%20algoritmo%20(análise%20resultados)/Insumos2018-2020.xlsx" table:table-name="VAB_I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ferencia_dado_texto_estoque" table:style-name="ta2">
        <table:table-source xlink:href="file://ibge.gov.br/dpe-conac/ContasAmbientais/SCEA%20Água/Terceiras%20CEAA_2018_2020/arquivo%20de%20saída%20do%20algoritmo%20(análise%20resultados)/Insumos2018-2020.xlsx" table:table-name="conferencia_dado_texto_estoq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ferência_dado_texto_fisica" table:style-name="ta2">
        <table:table-source xlink:href="file://ibge.gov.br/dpe-conac/ContasAmbientais/SCEA%20Água/Terceiras%20CEAA_2018_2020/arquivo%20de%20saída%20do%20algoritmo%20(análise%20resultados)/Insumos2018-2020.xlsx" table:table-name="conferência_dado_texto_fisi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ferência_dado_texto_hibrida" table:style-name="ta2">
        <table:table-source xlink:href="file://ibge.gov.br/dpe-conac/ContasAmbientais/SCEA%20Água/Terceiras%20CEAA_2018_2020/arquivo%20de%20saída%20do%20algoritmo%20(análise%20resultados)/Insumos2018-2020.xlsx" table:table-name="conferência_dado_texto_hibrid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conferência_dado_estoques_mateu" table:style-name="ta2">
        <table:table-source xlink:href="file://ibge.gov.br/dpe-conac/ContasAmbientais/SCEA%20Água/Terceiras%20CEAA_2018_2020/arquivo%20de%20saída%20do%20algoritmo%20(análise%20resultados)/Insumos2018-2020.xlsx" table:table-name="conferência_dado_estoques_mateu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bge.gov.br/dpe-conac/ContasAmbientais/SCEA%20Água/Terceiras%20CEAA_2018_2020/arquivo%20de%20saída%20do%20algoritmo%20(análise%20resultados)/Insumos2018-2020.xlsx'#Indicadores_apresentação_agua" table:style-name="ta2">
        <table:table-source xlink:href="file://ibge.gov.br/dpe-conac/ContasAmbientais/SCEA%20Água/Terceiras%20CEAA_2018_2020/arquivo%20de%20saída%20do%20algoritmo%20(análise%20resultados)/Insumos2018-2020.xlsx" table:table-name="Indicadores_apresentação_agua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36">
      <number:number number:decimal-places="1" number:min-decimal-places="1" number:min-integer-digits="1"/>
      <number:text>%</number:text>
    </number:percentage-style>
    <number:number-style style:name="N37">
      <number:number number:decimal-places="3" number:min-decimal-places="3" number:min-integer-digits="1"/>
    </number:number-style>
    <number:number-style style:name="N38">
      <number:number number:decimal-places="1" number:min-decimal-places="1" number:min-integer-digits="1" number:grouping="true"/>
    </number:number-style>
    <number:number-style style:name="N39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6pt" style:font-size-asian="6pt" style:font-size-complex="6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/>
    </style:style>
    <style:style style:name="Porcentagem" style:family="table-cell" style:data-style-name="N13"/>
    <style:style style:name="Porcentagem_32_2" style:display-name="Porcentagem 2" style:family="table-cell" style:data-style-name="N13"/>
    <style:style style:name="V_237_rgula" style:display-name="Vírgula" style:family="table-cell" style:data-style-name="N35"/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aqueline Coelho Visentin</meta:initial-creator>
    <dc:creator>Michel Vieira Lapip</dc:creator>
    <meta:creation-date>2020-03-03T13:48:17Z</meta:creation-date>
    <dc:date>2023-04-06T20:28:14Z</dc:date>
  </office:meta>
</office:document-meta>
</file>